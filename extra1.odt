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9.548cm" fo:margin-left="0cm" fo:margin-top="0cm" fo:margin-bottom="0cm" table:align="left" style:writing-mode="lr-tb"/>
    </style:style>
    <style:style style:name="Table1.A" style:family="table-column">
      <style:table-column-properties style:column-width="4.648cm"/>
    </style:style>
    <style:style style:name="Table1.B" style:family="table-column">
      <style:table-column-properties style:column-width="4.898cm"/>
    </style:style>
    <style:style style:name="Table1.1" style:family="table-row">
      <style:table-row-properties fo:keep-together="auto"/>
    </style:style>
    <style:style style:name="Table1.A1" style:family="table-cell">
      <style:table-cell-properties style:vertical-align="middle" fo:padding="0.049cm" fo:border="none"/>
    </style:style>
    <style:style style:name="Table2" style:family="table">
      <style:table-properties style:width="10.296cm" table:align="left" style:writing-mode="lr-tb"/>
    </style:style>
    <style:style style:name="Table2.A" style:family="table-column">
      <style:table-column-properties style:column-width="2.305cm"/>
    </style:style>
    <style:style style:name="Table2.B" style:family="table-column">
      <style:table-column-properties style:column-width="7.99cm"/>
    </style:style>
    <style:style style:name="Table2.A1" style:family="table-cell">
      <style:table-cell-properties style:vertical-align="middle" fo:padding="0.049cm" fo:border="none"/>
    </style:style>
    <style:style style:name="P1" style:family="paragraph" style:parent-style-name="Heading_20_1">
      <style:paragraph-properties fo:margin-top="0.423cm" fo:margin-bottom="0.212cm" style:contextual-spacing="false" fo:text-align="justify" style:justify-single-word="false" style:writing-mode="lr-tb"/>
      <style:text-properties officeooo:paragraph-rsid="000150ee"/>
    </style:style>
    <style:style style:name="P2" style:family="paragraph" style:parent-style-name="Heading_20_1">
      <style:paragraph-properties fo:text-align="justify" style:justify-single-word="false" style:writing-mode="lr-tb"/>
      <style:text-properties officeooo:paragraph-rsid="000150ee"/>
    </style:style>
    <style:style style:name="P3" style:family="paragraph" style:parent-style-name="Heading_20_1">
      <style:text-properties officeooo:paragraph-rsid="000150ee"/>
    </style:style>
    <style:style style:name="P4" style:family="paragraph" style:parent-style-name="Heading_20_2">
      <style:paragraph-properties fo:text-align="justify" style:justify-single-word="false" style:writing-mode="lr-tb"/>
      <style:text-properties officeooo:paragraph-rsid="000150ee"/>
    </style:style>
    <style:style style:name="P5" style:family="paragraph" style:parent-style-name="Heading_20_3">
      <style:paragraph-properties fo:text-align="justify" style:justify-single-word="false" style:writing-mode="lr-tb"/>
      <style:text-properties officeooo:paragraph-rsid="000150ee"/>
    </style:style>
    <style:style style:name="P6" style:family="paragraph" style:parent-style-name="Horizontal_20_Line">
      <style:paragraph-properties fo:text-align="justify" style:justify-single-word="false" style:writing-mode="lr-tb"/>
      <style:text-properties officeooo:paragraph-rsid="000150ee"/>
    </style:style>
    <style:style style:name="P7" style:family="paragraph" style:parent-style-name="Horizontal_20_Line">
      <style:text-properties officeooo:paragraph-rsid="000150ee"/>
    </style:style>
    <style:style style:name="P8" style:family="paragraph" style:parent-style-name="Preformatted_20_Text">
      <style:text-properties officeooo:paragraph-rsid="000150ee"/>
    </style:style>
    <style:style style:name="P9" style:family="paragraph" style:parent-style-name="Preformatted_20_Text">
      <style:paragraph-properties fo:margin-top="0cm" fo:margin-bottom="0.499cm" style:contextual-spacing="false"/>
      <style:text-properties officeooo:paragraph-rsid="000150ee"/>
    </style:style>
    <style:style style:name="P10" style:family="paragraph" style:parent-style-name="Quotations">
      <style:text-properties officeooo:paragraph-rsid="000150ee"/>
    </style:style>
    <style:style style:name="P11" style:family="paragraph" style:parent-style-name="Standard">
      <style:paragraph-properties fo:text-align="justify" style:justify-single-word="false" style:writing-mode="lr-tb"/>
      <style:text-properties officeooo:paragraph-rsid="000150ee"/>
    </style:style>
    <style:style style:name="P12" style:family="paragraph" style:parent-style-name="Table_20_Contents">
      <style:paragraph-properties fo:text-align="justify" style:justify-single-word="false" fo:orphans="0" fo:widows="0" style:writing-mode="lr-tb"/>
      <style:text-properties officeooo:paragraph-rsid="000150ee"/>
    </style:style>
    <style:style style:name="P13" style:family="paragraph" style:parent-style-name="Table_20_Contents">
      <style:text-properties officeooo:paragraph-rsid="000150ee"/>
    </style:style>
    <style:style style:name="P14" style:family="paragraph" style:parent-style-name="Table_20_Heading">
      <style:paragraph-properties fo:text-align="justify" style:justify-single-word="false" fo:orphans="0" fo:widows="0" style:writing-mode="lr-tb"/>
      <style:text-properties officeooo:paragraph-rsid="000150ee"/>
    </style:style>
    <style:style style:name="P15" style:family="paragraph" style:parent-style-name="Table_20_Heading">
      <style:text-properties officeooo:paragraph-rsid="000150ee"/>
    </style:style>
    <style:style style:name="P16" style:family="paragraph" style:parent-style-name="Text_20_body" style:list-style-name="WWNum1">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17" style:family="paragraph" style:parent-style-name="Text_20_body" style:list-style-name="WWNum2">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18" style:family="paragraph" style:parent-style-name="Text_20_body" style:list-style-name="WWNum3">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19" style:family="paragraph" style:parent-style-name="Text_20_body" style:list-style-name="WWNum4">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0" style:family="paragraph" style:parent-style-name="Text_20_body" style:list-style-name="WWNum5">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1" style:family="paragraph" style:parent-style-name="Text_20_body" style:list-style-name="WWNum6">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2" style:family="paragraph" style:parent-style-name="Text_20_body" style:list-style-name="WWNum7">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3" style:family="paragraph" style:parent-style-name="Text_20_body" style:list-style-name="WWNum8">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4" style:family="paragraph" style:parent-style-name="Text_20_body" style:list-style-name="WWNum9">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5" style:family="paragraph" style:parent-style-name="Text_20_body" style:list-style-name="WWNum10">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6" style:family="paragraph" style:parent-style-name="Text_20_body" style:list-style-name="WWNum11">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7" style:family="paragraph" style:parent-style-name="Text_20_body" style:list-style-name="WWNum12">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8" style:family="paragraph" style:parent-style-name="Text_20_body" style:list-style-name="WWNum13">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29" style:family="paragraph" style:parent-style-name="Text_20_body" style:list-style-name="WWNum14">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0" style:family="paragraph" style:parent-style-name="Text_20_body" style:list-style-name="WWNum15">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1" style:family="paragraph" style:parent-style-name="Text_20_body" style:list-style-name="WWNum16">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2" style:family="paragraph" style:parent-style-name="Text_20_body" style:list-style-name="WWNum17">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3" style:family="paragraph" style:parent-style-name="Text_20_body" style:list-style-name="WWNum18">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4" style:family="paragraph" style:parent-style-name="Text_20_body" style:list-style-name="WWNum19">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5" style:family="paragraph" style:parent-style-name="Text_20_body" style:list-style-name="WWNum20">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6" style:family="paragraph" style:parent-style-name="Text_20_body" style:list-style-name="WWNum21">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7" style:family="paragraph" style:parent-style-name="Text_20_body" style:list-style-name="WWNum22">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8" style:family="paragraph" style:parent-style-name="Text_20_body" style:list-style-name="WWNum23">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39" style:family="paragraph" style:parent-style-name="Text_20_body" style:list-style-name="WWNum24">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40" style:family="paragraph" style:parent-style-name="Text_20_body" style:list-style-name="WWNum25">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41" style:family="paragraph" style:parent-style-name="Text_20_body" style:list-style-name="WWNum26">
      <style:paragraph-properties fo:margin-left="1.251cm" fo:margin-right="0cm" fo:text-align="justify" style:justify-single-word="false" fo:text-indent="-0.499cm" style:auto-text-indent="false" style:writing-mode="lr-tb">
        <style:tab-stops>
          <style:tab-stop style:position="1.251cm"/>
        </style:tab-stops>
      </style:paragraph-properties>
      <style:text-properties officeooo:paragraph-rsid="000150ee"/>
    </style:style>
    <style:style style:name="P42" style:family="paragraph" style:parent-style-name="Text_20_body">
      <style:paragraph-properties fo:text-align="justify" style:justify-single-word="false" style:writing-mode="lr-tb"/>
      <style:text-properties officeooo:paragraph-rsid="000150ee"/>
    </style:style>
    <style:style style:name="P43" style:family="paragraph" style:parent-style-name="Text_20_body" style:list-style-name="L1">
      <style:text-properties officeooo:paragraph-rsid="000150ee"/>
    </style:style>
    <style:style style:name="P44" style:family="paragraph" style:parent-style-name="Text_20_body" style:list-style-name="L7">
      <style:text-properties officeooo:paragraph-rsid="000150ee"/>
    </style:style>
    <style:style style:name="P45" style:family="paragraph" style:parent-style-name="Text_20_body" style:list-style-name="L8">
      <style:text-properties officeooo:paragraph-rsid="000150ee"/>
    </style:style>
    <style:style style:name="P46" style:family="paragraph" style:parent-style-name="Text_20_body" style:list-style-name="L9">
      <style:text-properties officeooo:paragraph-rsid="000150ee"/>
    </style:style>
    <style:style style:name="P47" style:family="paragraph" style:parent-style-name="Text_20_body" style:list-style-name="L10">
      <style:text-properties officeooo:paragraph-rsid="000150ee"/>
    </style:style>
    <style:style style:name="P48" style:family="paragraph" style:parent-style-name="Text_20_body" style:list-style-name="L11">
      <style:text-properties officeooo:paragraph-rsid="000150ee"/>
    </style:style>
    <style:style style:name="P49" style:family="paragraph" style:parent-style-name="Text_20_body">
      <style:text-properties officeooo:paragraph-rsid="000150e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ep Learning Architectures for Sonar-Based Target Detection Using Time-Frequency Spectrograms</text:h>
      <text:h text:style-name="P4" text:outline-level="2">1. ResNet (Residual Network)</text:h>
      <text:h text:style-name="P5" text:outline-level="3">Introduction</text:h>
      <text:p text:style-name="P42">ResNet (Residual Network) was proposed by Kaiming He et al. in 2015 to solve the degradation problem that occurs when neural networks become very deep. As the number of layers increases, the training accuracy of conventional CNNs may decrease due to optimization difficulties.</text:p>
      <text:p text:style-name="P42">In this project, sonar signals are represented as time-frequency spectrogram images. ResNet can effectively extract meaningful patterns such as propeller harmonics, cavitation signatures, and wake turbulence regions from these spectrograms.</text:p>
      <text:p text:style-name="P6"/>
      <text:h text:style-name="P4" text:outline-level="2">Vanishing Gradient Problem</text:h>
      <text:p text:style-name="P42">During backpropagation, gradients are propagated from the output layer toward the input layer.</text:p>
      <text:p text:style-name="P42">In very deep neural networks:</text:p>
      <text:list xml:id="list3707137909" text:style-name="WWNum1">
        <text:list-item>
          <text:p text:style-name="P16">Gradients become extremely small.</text:p>
        </text:list-item>
        <text:list-item>
          <text:p text:style-name="P16">Earlier layers learn very slowly.</text:p>
        </text:list-item>
        <text:list-item>
          <text:p text:style-name="P16">Training becomes difficult.</text:p>
        </text:list-item>
        <text:list-item>
          <text:p text:style-name="P16">Accuracy may stop improving.</text:p>
        </text:list-item>
      </text:list>
      <text:p text:style-name="P42">This phenomenon is called the <text:span text:style-name="Strong_20_Emphasis">vanishing gradient problem</text:span>.</text:p>
      <text:p text:style-name="P42">For example:</text:p>
      <text:p text:style-name="P42">Suppose a network contains 50 layers.</text:p>
      <text:p text:style-name="P42">During backpropagation:</text:p>
      <text:p text:style-name="P42">Gradient:</text:p>
      <text:p text:style-name="P42">0.9 × 0.9 × 0.9 × ... × 0.9 (50 times)</text:p>
      <text:p text:style-name="P42">≈ 0.005</text:p>
      <text:p text:style-name="P42">The gradient becomes almost zero.</text:p>
      <text:p text:style-name="P42">As a result:</text:p>
      <text:list xml:id="list3643647756" text:style-name="WWNum2">
        <text:list-item>
          <text:p text:style-name="P17">Initial layers do not update properly.</text:p>
        </text:list-item>
        <text:list-item>
          <text:p text:style-name="P17">Learning becomes inefficient.</text:p>
        </text:list-item>
      </text:list>
      <text:p text:style-name="P6"><text:soft-page-break/></text:p>
      <text:h text:style-name="P4" text:outline-level="2">Residual Connections (Skip Connections)</text:h>
      <text:p text:style-name="P42">ResNet solves this problem using <text:span text:style-name="Strong_20_Emphasis">skip connections</text:span>.</text:p>
      <text:p text:style-name="P42">Instead of learning:</text:p>
      <text:p text:style-name="P42">[<text:line-break/>H(x)<text:line-break/>]</text:p>
      <text:p text:style-name="P42">ResNet learns:</text:p>
      <text:p text:style-name="P42">[<text:line-break/>F(x)=H(x)-x<text:line-break/>]</text:p>
      <text:p text:style-name="P42">Then,</text:p>
      <text:p text:style-name="P42">[<text:line-break/>H(x)=F(x)+x<text:line-break/>]</text:p>
      <text:p text:style-name="P42">Here:</text:p>
      <text:list xml:id="list3353181890" text:style-name="WWNum3">
        <text:list-item>
          <text:p text:style-name="P18">x = input</text:p>
        </text:list-item>
        <text:list-item>
          <text:p text:style-name="P18">F(x) = features learned by the layer</text:p>
        </text:list-item>
        <text:list-item>
          <text:p text:style-name="P18">x is directly added to the output.</text:p>
        </text:list-item>
      </text:list>
      <text:p text:style-name="P42">Structure:</text:p>
      <text:p text:style-name="P42">Input</text:p>
      <text:p text:style-name="P42">↓</text:p>
      <text:p text:style-name="P42">Convolution</text:p>
      <text:p text:style-name="P42">↓</text:p>
      <text:p text:style-name="P42">Convolution</text:p>
      <text:p text:style-name="P42">↓</text:p>
      <text:p text:style-name="P42">Add Original Input</text:p>
      <text:p text:style-name="P42">↓</text:p>
      <text:p text:style-name="P42">Output</text:p>
      <text:p text:style-name="P42">This allows information to flow directly across layers.</text:p>
      <text:p text:style-name="P42">Advantages:</text:p>
      <text:list xml:id="list1942214694" text:style-name="WWNum4">
        <text:list-item>
          <text:p text:style-name="P19">Prevents vanishing gradients.</text:p>
        </text:list-item>
        <text:list-item>
          <text:p text:style-name="P19">Easier optimization.</text:p>
        </text:list-item>
        <text:list-item>
          <text:p text:style-name="P19"><text:soft-page-break/>Faster convergence.</text:p>
        </text:list-item>
        <text:list-item>
          <text:p text:style-name="P19">Enables deeper networks.</text:p>
        </text:list-item>
      </text:list>
      <text:p text:style-name="P6"/>
      <text:h text:style-name="P4" text:outline-level="2">ResNet18, ResNet34 and ResNet50</text:h>
      <text:h text:style-name="P5" text:outline-level="3">ResNet18</text:h>
      <text:list xml:id="list971182071" text:style-name="WWNum5">
        <text:list-item>
          <text:p text:style-name="P20">18 layers</text:p>
        </text:list-item>
        <text:list-item>
          <text:p text:style-name="P20">Lightweight</text:p>
        </text:list-item>
        <text:list-item>
          <text:p text:style-name="P20">Fast training</text:p>
        </text:list-item>
        <text:list-item>
          <text:p text:style-name="P20">Suitable for smaller datasets</text:p>
        </text:list-item>
      </text:list>
      <text:h text:style-name="P5" text:outline-level="3">ResNet34</text:h>
      <text:list xml:id="list2559308470" text:style-name="WWNum6">
        <text:list-item>
          <text:p text:style-name="P21">34 layers</text:p>
        </text:list-item>
        <text:list-item>
          <text:p text:style-name="P21">Better feature extraction</text:p>
        </text:list-item>
        <text:list-item>
          <text:p text:style-name="P21">Moderate computational cost</text:p>
        </text:list-item>
      </text:list>
      <text:h text:style-name="P5" text:outline-level="3">ResNet50</text:h>
      <text:list xml:id="list3001279709" text:style-name="WWNum7">
        <text:list-item>
          <text:p text:style-name="P22">50 layers</text:p>
        </text:list-item>
        <text:list-item>
          <text:p text:style-name="P22">Uses bottleneck blocks</text:p>
        </text:list-item>
        <text:list-item>
          <text:p text:style-name="P22">Extracts highly complex patterns</text:p>
        </text:list-item>
        <text:list-item>
          <text:p text:style-name="P22">Most widely used version</text:p>
        </text:list-item>
      </text:list>
      <text:p text:style-name="P6"/>
      <text:h text:style-name="P4" text:outline-level="2">Why Deep Networks Become Trainable</text:h>
      <text:p text:style-name="P42">ResNet makes deep networks trainable because:</text:p>
      <text:list xml:id="list3084405283" text:style-name="WWNum8">
        <text:list-item>
          <text:p text:style-name="P23">Skip connections preserve information.</text:p>
        </text:list-item>
        <text:list-item>
          <text:p text:style-name="P23">Gradients flow easily backward.</text:p>
        </text:list-item>
        <text:list-item>
          <text:p text:style-name="P23">Earlier layers continue learning.</text:p>
        </text:list-item>
        <text:list-item>
          <text:p text:style-name="P23">Optimization becomes stable.</text:p>
        </text:list-item>
      </text:list>
      <text:p text:style-name="P42">Without ResNet:</text:p>
      <text:p text:style-name="P42">50-layer CNN → difficult to train</text:p>
      <text:p text:style-name="P42">With ResNet:</text:p>
      <text:p text:style-name="P42">50-layer network → stable and accurate</text:p>
      <text:p text:style-name="P6"/>
      <text:h text:style-name="P4" text:outline-level="2"><text:soft-page-break/>Application on Sonar Spectrogram Images</text:h>
      <text:p text:style-name="P42">Input:</text:p>
      <text:p text:style-name="P42">Time-frequency spectrogram</text:p>
      <text:p text:style-name="P42">X-axis → Time</text:p>
      <text:p text:style-name="P42">Y-axis → Frequency</text:p>
      <text:p text:style-name="P42">Color intensity → Signal energy</text:p>
      <text:p text:style-name="P42">ResNet can learn:</text:p>
      <text:list xml:id="list2320200508" text:style-name="WWNum9">
        <text:list-item>
          <text:p text:style-name="P24">Propeller harmonic bands</text:p>
        </text:list-item>
        <text:list-item>
          <text:p text:style-name="P24">Blade passing frequency patterns</text:p>
        </text:list-item>
        <text:list-item>
          <text:p text:style-name="P24">Cavitation bursts</text:p>
        </text:list-item>
        <text:list-item>
          <text:p text:style-name="P24">Wake turbulence</text:p>
        </text:list-item>
        <text:list-item>
          <text:p text:style-name="P24">Energy concentration regions</text:p>
        </text:list-item>
      </text:list>
      <text:p text:style-name="P42">Advantages:</text:p>
      <text:list xml:id="list987930477" text:style-name="WWNum10">
        <text:list-item>
          <text:p text:style-name="P25">Excellent feature extraction</text:p>
        </text:list-item>
        <text:list-item>
          <text:p text:style-name="P25">Robust against ocean noise</text:p>
        </text:list-item>
        <text:list-item>
          <text:p text:style-name="P25">Suitable for sonar image classification</text:p>
        </text:list-item>
      </text:list>
      <text:p text:style-name="P6"/>
      <text:h text:style-name="P2" text:outline-level="1">2. EfficientNet</text:h>
      <text:h text:style-name="P4" text:outline-level="2">Introduction</text:h>
      <text:p text:style-name="P42">EfficientNet was proposed by Mingxing Tan and Quoc Le in 2019.</text:p>
      <text:p text:style-name="P42">Instead of making networks deeper or wider independently, EfficientNet scales the entire network in a balanced manner.</text:p>
      <text:p text:style-name="P42">The goal is:</text:p>
      <text:p text:style-name="P42"><text:span text:style-name="Strong_20_Emphasis">Maximum accuracy with minimum computation.</text:span></text:p>
      <text:p text:style-name="P6"/>
      <text:h text:style-name="P4" text:outline-level="2">Compound Scaling</text:h>
      <text:p text:style-name="P42">Traditional approaches:</text:p>
      <text:p text:style-name="P42">Only increase:</text:p>
      <text:list xml:id="list4105856785" text:style-name="WWNum11">
        <text:list-item>
          <text:p text:style-name="P26">Depth OR</text:p>
        </text:list-item>
        <text:list-item>
          <text:p text:style-name="P26">Width OR</text:p>
        </text:list-item>
        <text:list-item>
          <text:p text:style-name="P26"><text:soft-page-break/>Image resolution</text:p>
        </text:list-item>
      </text:list>
      <text:p text:style-name="P42">EfficientNet scales all three together.</text:p>
      <text:p text:style-name="P42">Compound scaling formula:</text:p>
      <text:p text:style-name="P42">Depth = α</text:p>
      <text:p text:style-name="P42">Width = β</text:p>
      <text:p text:style-name="P42">Resolution = γ</text:p>
      <text:p text:style-name="P42">This balanced scaling improves performance significantly.</text:p>
      <text:p text:style-name="P6"/>
      <text:h text:style-name="P4" text:outline-level="2">Scaling Depth, Width and Resolution</text:h>
      <text:h text:style-name="P5" text:outline-level="3">Depth</text:h>
      <text:p text:style-name="P42">Increase number of layers.</text:p>
      <text:p text:style-name="P42">Benefits:</text:p>
      <text:list xml:id="list2425062332" text:style-name="WWNum12">
        <text:list-item>
          <text:p text:style-name="P27">Learns complex features.</text:p>
        </text:list-item>
      </text:list>
      <text:h text:style-name="P5" text:outline-level="3">Width</text:h>
      <text:p text:style-name="P42">Increase number of neurons per layer.</text:p>
      <text:p text:style-name="P42">Benefits:</text:p>
      <text:list xml:id="list2398390025" text:style-name="WWNum13">
        <text:list-item>
          <text:p text:style-name="P28">Learns more patterns simultaneously.</text:p>
        </text:list-item>
      </text:list>
      <text:h text:style-name="P5" text:outline-level="3">Resolution</text:h>
      <text:p text:style-name="P42">Increase image size.</text:p>
      <text:p text:style-name="P42">Benefits:</text:p>
      <text:list xml:id="list2524173667" text:style-name="WWNum14">
        <text:list-item>
          <text:p text:style-name="P29">Captures finer details.</text:p>
        </text:list-item>
      </text:list>
      <text:p text:style-name="P42">EfficientNet optimizes all three simultaneously.</text:p>
      <text:p text:style-name="P6"/>
      <text:h text:style-name="P4" text:outline-level="2">EfficientNet B0 to B7</text:h>
      <text:h text:style-name="P5" text:outline-level="3">EfficientNet-B0</text:h>
      <text:p text:style-name="P42">Baseline network.</text:p>
      <text:h text:style-name="P5" text:outline-level="3">EfficientNet-B1</text:h>
      <text:p text:style-name="P42">Slightly larger.</text:p>
      <text:h text:style-name="P5" text:outline-level="3"><text:soft-page-break/>EfficientNet-B2</text:h>
      <text:p text:style-name="P42">More accurate.</text:p>
      <text:h text:style-name="P5" text:outline-level="3">EfficientNet-B3</text:h>
      <text:p text:style-name="P42">Moderate size.</text:p>
      <text:h text:style-name="P5" text:outline-level="3">EfficientNet-B4</text:h>
      <text:p text:style-name="P42">High accuracy.</text:p>
      <text:h text:style-name="P5" text:outline-level="3">EfficientNet-B5</text:h>
      <text:p text:style-name="P42">Advanced model.</text:p>
      <text:h text:style-name="P5" text:outline-level="3">EfficientNet-B6</text:h>
      <text:p text:style-name="P42">Very large.</text:p>
      <text:h text:style-name="P5" text:outline-level="3">EfficientNet-B7</text:h>
      <text:p text:style-name="P42">Highest accuracy.</text:p>
      <text:p text:style-name="P42">As we move from B0 → B7:</text:p>
      <text:list xml:id="list373201368" text:style-name="WWNum15">
        <text:list-item>
          <text:p text:style-name="P30">Accuracy increases.</text:p>
        </text:list-item>
        <text:list-item>
          <text:p text:style-name="P30">Computational cost increases.</text:p>
        </text:list-item>
      </text:list>
      <text:p text:style-name="P42">For sonar projects:</text:p>
      <text:p text:style-name="P42">B0, B1, B2 or B3 are usually sufficient.</text:p>
      <text:p text:style-name="P6"/>
      <text:h text:style-name="P4" text:outline-level="2">Fewer Parameters with High Accuracy</text:h>
      <text:p text:style-name="P42">Compared to ResNet:</text:p>
      <text:p text:style-name="P42">ResNet50:</text:p>
      <text:p text:style-name="P42">25 million parameters</text:p>
      <text:p text:style-name="P42">EfficientNet-B0:</text:p>
      <text:p text:style-name="P42">5 million parameters</text:p>
      <text:p text:style-name="P42">Advantages:</text:p>
      <text:list xml:id="list1115549769" text:style-name="WWNum16">
        <text:list-item>
          <text:p text:style-name="P31">Smaller model</text:p>
        </text:list-item>
        <text:list-item>
          <text:p text:style-name="P31">Faster training</text:p>
        </text:list-item>
        <text:list-item>
          <text:p text:style-name="P31">Less memory usage</text:p>
        </text:list-item>
        <text:list-item>
          <text:p text:style-name="P31">High accuracy</text:p>
        </text:list-item>
      </text:list>
      <text:p text:style-name="P6"/>
      <text:h text:style-name="P4" text:outline-level="2"><text:soft-page-break/>Suitable for Real-Time Deployment</text:h>
      <text:p text:style-name="P42">EfficientNet is ideal for:</text:p>
      <text:list xml:id="list1248917279" text:style-name="WWNum17">
        <text:list-item>
          <text:p text:style-name="P32">Embedded systems</text:p>
        </text:list-item>
        <text:list-item>
          <text:p text:style-name="P32">Naval systems</text:p>
        </text:list-item>
        <text:list-item>
          <text:p text:style-name="P32">Edge devices</text:p>
        </text:list-item>
        <text:list-item>
          <text:p text:style-name="P32">Real-time target detection</text:p>
        </text:list-item>
      </text:list>
      <text:p text:style-name="P42">Benefits:</text:p>
      <text:list xml:id="list3998765353" text:style-name="WWNum18">
        <text:list-item>
          <text:p text:style-name="P33">Low computational cost</text:p>
        </text:list-item>
        <text:list-item>
          <text:p text:style-name="P33">Fast inference</text:p>
        </text:list-item>
        <text:list-item>
          <text:p text:style-name="P33">Energy efficient</text:p>
        </text:list-item>
      </text:list>
      <text:p text:style-name="P6"/>
      <text:h text:style-name="P2" text:outline-level="1">3. Attention Mechanism</text:h>
      <text:h text:style-name="P4" text:outline-level="2">Introduction</text:h>
      <text:p text:style-name="P42">Attention allows a model to focus on important regions instead of treating every region equally.</text:p>
      <text:p text:style-name="P42">Human analogy:</text:p>
      <text:p text:style-name="P42">When reading a paragraph, we focus only on important words.</text:p>
      <text:p text:style-name="P42">Similarly, attention focuses on important parts of a spectrogram.</text:p>
      <text:p text:style-name="P6"/>
      <text:h text:style-name="P4" text:outline-level="2">Query (Q)</text:h>
      <text:p text:style-name="P42">Represents:</text:p>
      <text:p text:style-name="P42">"What information am I looking for?"</text:p>
      <text:p text:style-name="P6"/>
      <text:h text:style-name="P4" text:outline-level="2">Key (K)</text:h>
      <text:p text:style-name="P42">Represents:</text:p>
      <text:p text:style-name="P42">"What information is available?"</text:p>
      <text:p text:style-name="P6"/>
      <text:h text:style-name="P4" text:outline-level="2">Value (V)</text:h>
      <text:p text:style-name="P42">Represents:</text:p>
      <text:p text:style-name="P42"><text:soft-page-break/>"The actual information to be used."</text:p>
      <text:p text:style-name="P6"/>
      <text:h text:style-name="P4" text:outline-level="2">Self-Attention</text:h>
      <text:p text:style-name="P42">Self-attention allows every region of the input to communicate with every other region.</text:p>
      <text:p text:style-name="P42">For each region:</text:p>
      <text:p text:style-name="P42">Attention Score:</text:p>
      <text:p text:style-name="P42">[<text:line-break/>Q*K^T<text:line-break/>]</text:p>
      <text:p text:style-name="P42">Then:</text:p>
      <text:p text:style-name="P42">Softmax</text:p>
      <text:p text:style-name="P42">↓</text:p>
      <text:p text:style-name="P42">Weighted sum of V</text:p>
      <text:p text:style-name="P42">↓</text:p>
      <text:p text:style-name="P42">Final output</text:p>
      <text:p text:style-name="P42">This helps understand relationships across the entire image.</text:p>
      <text:p text:style-name="P6"/>
      <text:h text:style-name="P4" text:outline-level="2">Multi-Head Attention</text:h>
      <text:p text:style-name="P42">Instead of one attention operation, multiple attention operations run simultaneously.</text:p>
      <text:p text:style-name="P42">Each head learns different information.</text:p>
      <text:p text:style-name="P42">For example:</text:p>
      <text:p text:style-name="P42">Head 1:</text:p>
      <text:p text:style-name="P42">Propeller harmonics</text:p>
      <text:p text:style-name="P42">Head 2:</text:p>
      <text:p text:style-name="P42">Cavitation patterns</text:p>
      <text:p text:style-name="P42">Head 3:</text:p>
      <text:p text:style-name="P42">Wake turbulence</text:p>
      <text:p text:style-name="P42">Head 4:</text:p>
      <text:p text:style-name="P42">Background ocean noise</text:p>
      <text:p text:style-name="P42">Finally, all heads are combined.</text:p>
      <text:p text:style-name="P6"/>
      <text:h text:style-name="P4" text:outline-level="2"><text:soft-page-break/>Why Attention Focuses on Important Frequency Regions</text:h>
      <text:p text:style-name="P42">In sonar spectrograms:</text:p>
      <text:p text:style-name="P42">Not all regions contain useful information.</text:p>
      <text:p text:style-name="P42">Important regions:</text:p>
      <text:list xml:id="list482845041" text:style-name="WWNum19">
        <text:list-item>
          <text:p text:style-name="P34">Blade passing frequencies</text:p>
        </text:list-item>
        <text:list-item>
          <text:p text:style-name="P34">Harmonic bands</text:p>
        </text:list-item>
        <text:list-item>
          <text:p text:style-name="P34">Cavitation energy</text:p>
        </text:list-item>
        <text:list-item>
          <text:p text:style-name="P34">Wake turbulence</text:p>
        </text:list-item>
      </text:list>
      <text:p text:style-name="P42">Attention automatically assigns higher weights to these regions.</text:p>
      <text:p text:style-name="P42">Benefits:</text:p>
      <text:list xml:id="list2706485965" text:style-name="WWNum20">
        <text:list-item>
          <text:p text:style-name="P35">Reduces noise influence</text:p>
        </text:list-item>
        <text:list-item>
          <text:p text:style-name="P35">Improves detection accuracy</text:p>
        </text:list-item>
        <text:list-item>
          <text:p text:style-name="P35">Better target localization</text:p>
        </text:list-item>
      </text:list>
      <text:p text:style-name="P6"/>
      <text:h text:style-name="P2" text:outline-level="1">4. Transformers</text:h>
      <text:h text:style-name="P4" text:outline-level="2">Introduction</text:h>
      <text:p text:style-name="P42">Transformers were introduced in 2017.</text:p>
      <text:p text:style-name="P42">Unlike CNNs, Transformers process the entire input simultaneously.</text:p>
      <text:p text:style-name="P42">They rely completely on self-attention.</text:p>
      <text:p text:style-name="P6"/>
      <text:h text:style-name="P4" text:outline-level="2">Patch Embedding</text:h>
      <text:p text:style-name="P42">The spectrogram is divided into small patches.</text:p>
      <text:p text:style-name="P42">Example:</text:p>
      <text:p text:style-name="P42">224×224 image</text:p>
      <text:p text:style-name="P42">↓</text:p>
      <text:p text:style-name="P42">16×16 patches</text:p>
      <text:p text:style-name="P42">↓</text:p>
      <text:p text:style-name="P42">196 patches</text:p>
      <text:p text:style-name="P42">Each patch becomes a vector.</text:p>
      <text:p text:style-name="P6"/>
      <text:h text:style-name="P4" text:outline-level="2"><text:soft-page-break/>Positional Encoding</text:h>
      <text:p text:style-name="P42">Transformers do not understand positions naturally.</text:p>
      <text:p text:style-name="P42">Positional encoding adds location information.</text:p>
      <text:p text:style-name="P42">The model now knows:</text:p>
      <text:list xml:id="list1631378060" text:style-name="WWNum21">
        <text:list-item>
          <text:p text:style-name="P36">Where the patch is located.</text:p>
        </text:list-item>
        <text:list-item>
          <text:p text:style-name="P36">Relative positions.</text:p>
        </text:list-item>
      </text:list>
      <text:p text:style-name="P6"/>
      <text:h text:style-name="P4" text:outline-level="2">Self-Attention Blocks</text:h>
      <text:p text:style-name="P42">Each patch communicates with all other patches.</text:p>
      <text:p text:style-name="P42">The network learns:</text:p>
      <text:list xml:id="list3010719192" text:style-name="WWNum22">
        <text:list-item>
          <text:p text:style-name="P37">Local relationships</text:p>
        </text:list-item>
        <text:list-item>
          <text:p text:style-name="P37">Global relationships</text:p>
        </text:list-item>
      </text:list>
      <text:p text:style-name="P42">simultaneously.</text:p>
      <text:p text:style-name="P6"/>
      <text:h text:style-name="P4" text:outline-level="2">Global Context Learning</text:h>
      <text:p text:style-name="P42">CNN:</text:p>
      <text:p text:style-name="P42">Looks at nearby pixels.</text:p>
      <text:p text:style-name="P42">Transformer:</text:p>
      <text:p text:style-name="P42">Looks at the entire image.</text:p>
      <text:p text:style-name="P42">Example:</text:p>
      <text:p text:style-name="P42">A weak harmonic at time 2 seconds may relate to another harmonic at 8 seconds.</text:p>
      <text:p text:style-name="P42">Transformers can detect such relationships.</text:p>
      <text:p text:style-name="P6"/>
      <text:h text:style-name="P4" text:outline-level="2">Difference Between CNN and Transformer</text:h>
      <table:table table:name="Table1" table:style-name="Table1">
        <table:table-column table:style-name="Table1.A"/>
        <table:table-column table:style-name="Table1.B"/>
        <table:table-header-rows>
          <table:table-row table:style-name="Table1.1">
            <table:table-cell table:style-name="Table1.A1" office:value-type="string">
              <text:p text:style-name="P14">CNN</text:p>
            </table:table-cell>
            <table:table-cell table:style-name="Table1.A1" office:value-type="string">
              <text:p text:style-name="P14">Transformer</text:p>
            </table:table-cell>
          </table:table-row>
        </table:table-header-rows>
        <table:table-row table:style-name="Table1.1">
          <table:table-cell table:style-name="Table1.A1" office:value-type="string">
            <text:p text:style-name="P12">Learns local features</text:p>
          </table:table-cell>
          <table:table-cell table:style-name="Table1.A1" office:value-type="string">
            <text:p text:style-name="P12">Learns global features</text:p>
          </table:table-cell>
        </table:table-row>
        <table:table-row table:style-name="Table1.1">
          <table:table-cell table:style-name="Table1.A1" office:value-type="string">
            <text:p text:style-name="P12">Uses convolution filters</text:p>
          </table:table-cell>
          <table:table-cell table:style-name="Table1.A1" office:value-type="string">
            <text:p text:style-name="P12">Uses self-attention</text:p>
          </table:table-cell>
        </table:table-row>
        <table:table-row table:style-name="Table1.1">
          <table:table-cell table:style-name="Table1.A1" office:value-type="string">
            <text:p text:style-name="P12">Smaller datasets sufficient</text:p>
          </table:table-cell>
          <table:table-cell table:style-name="Table1.A1" office:value-type="string">
            <text:p text:style-name="P12">Requires larger datasets</text:p>
          </table:table-cell>
        </table:table-row>
        <table:table-row table:style-name="Table1.1">
          <table:table-cell table:style-name="Table1.A1" office:value-type="string">
            <text:p text:style-name="P12">Faster training</text:p>
          </table:table-cell>
          <table:table-cell table:style-name="Table1.A1" office:value-type="string">
            <text:p text:style-name="P12">Computationally expensive</text:p>
          </table:table-cell>
        </table:table-row>
        <table:table-row table:style-name="Table1.1">
          <table:table-cell table:style-name="Table1.A1" office:value-type="string">
            <text:p text:style-name="P12">Limited receptive field</text:p>
          </table:table-cell>
          <table:table-cell table:style-name="Table1.A1" office:value-type="string">
            <text:p text:style-name="P12">Entire image is visible</text:p>
          </table:table-cell>
        </table:table-row>
      </table:table>
      <text:p text:style-name="P6"/>
      <text:h text:style-name="P2" text:outline-level="1"><text:soft-page-break/>5. Audio Spectrogram Transformer (AST)</text:h>
      <text:h text:style-name="P4" text:outline-level="2">Introduction</text:h>
      <text:p text:style-name="P42">Audio Spectrogram Transformer (AST) is a Transformer architecture specifically designed for audio data.</text:p>
      <text:p text:style-name="P42">It directly uses spectrogram images as input.</text:p>
      <text:p text:style-name="P42">No handcrafted feature extraction is required.</text:p>
      <text:p text:style-name="P6"/>
      <text:h text:style-name="P4" text:outline-level="2">Directly Processes Time-Frequency Images</text:h>
      <text:p text:style-name="P42">Input:</text:p>
      <text:p text:style-name="P42">Sonar signal</text:p>
      <text:p text:style-name="P42">↓</text:p>
      <text:p text:style-name="P42">STFT</text:p>
      <text:p text:style-name="P42">↓</text:p>
      <text:p text:style-name="P42">Spectrogram</text:p>
      <text:p text:style-name="P42">↓</text:p>
      <text:p text:style-name="P42">Patch Embedding</text:p>
      <text:p text:style-name="P42">↓</text:p>
      <text:p text:style-name="P42">Transformer Encoder</text:p>
      <text:p text:style-name="P42">↓</text:p>
      <text:p text:style-name="P42">Classification</text:p>
      <text:p text:style-name="P6"/>
      <text:h text:style-name="P4" text:outline-level="2">Learns Global Relationships Between Distant Frequency Regions</text:h>
      <text:p text:style-name="P42">AST can identify relationships between:</text:p>
      <text:list xml:id="list2347116657" text:style-name="WWNum23">
        <text:list-item>
          <text:p text:style-name="P38">Low-frequency wake patterns</text:p>
        </text:list-item>
        <text:list-item>
          <text:p text:style-name="P38">High-frequency cavitation bursts</text:p>
        </text:list-item>
        <text:list-item>
          <text:p text:style-name="P38">Harmonic structures</text:p>
        </text:list-item>
        <text:list-item>
          <text:p text:style-name="P38">Background noise</text:p>
        </text:list-item>
      </text:list>
      <text:p text:style-name="P42">Even if these regions are far apart.</text:p>
      <text:p text:style-name="P6"/>
      <text:h text:style-name="P4" text:outline-level="2"><text:soft-page-break/>Why AST is Highly Suitable for Sonar Data</text:h>
      <text:p text:style-name="P42">Your dataset already contains:</text:p>
      <text:list xml:id="list2399565937" text:style-name="WWNum24">
        <text:list-item>
          <text:p text:style-name="P39">Time axis</text:p>
        </text:list-item>
        <text:list-item>
          <text:p text:style-name="P39">Frequency axis</text:p>
        </text:list-item>
        <text:list-item>
          <text:p text:style-name="P39">Energy intensity</text:p>
        </text:list-item>
      </text:list>
      <text:p text:style-name="P42">This perfectly matches AST requirements.</text:p>
      <text:p text:style-name="P42">Advantages:</text:p>
      <text:list xml:id="list1801751858" text:style-name="WWNum25">
        <text:list-item>
          <text:p text:style-name="P40">No manual feature engineering</text:p>
        </text:list-item>
        <text:list-item>
          <text:p text:style-name="P40">Learns global dependencies</text:p>
        </text:list-item>
        <text:list-item>
          <text:p text:style-name="P40">Highly robust to ocean noise</text:p>
        </text:list-item>
        <text:list-item>
          <text:p text:style-name="P40">Excellent target detection capability</text:p>
        </text:list-item>
      </text:list>
      <text:p text:style-name="P6"/>
      <text:h text:style-name="P2" text:outline-level="1">Conclusion</text:h>
      <text:p text:style-name="P42">For this project, the sonar data is represented as time-frequency spectrogram images rather than pure sequential time-series data. Therefore, the objective is to identify spatial energy distributions, harmonic structures, cavitation signatures, and wake turbulence patterns instead of learning long-term sequential dependencies.</text:p>
      <text:p text:style-name="P42">Although CNN-LSTM has shown good performance in some acoustic applications, it is not the most suitable architecture for this problem because there is limited dependency on long sequential information.</text:p>
      <text:p text:style-name="P42">ResNet provides deep feature extraction through residual learning, EfficientNet offers high accuracy with fewer parameters, Attention mechanisms help the model focus on important frequency regions, and Transformers learn global relationships across the entire spectrogram. Among these approaches, Audio Spectrogram Transformer (AST) is particularly promising because it is specifically designed for spectrogram-based audio analysis.</text:p>
      <text:p text:style-name="P42">Therefore, a research-oriented implementation for this project should prioritize <text:span text:style-name="Strong_20_Emphasis">EfficientNet + Attention</text:span>, <text:span text:style-name="Strong_20_Emphasis">ResNet + Attention</text:span>, and <text:span text:style-name="Strong_20_Emphasis">Audio Spectrogram Transformer (AST)</text:span>, while using CNN-LSTM only as a comparative baseline model rather than the final architecture.</text:p>
      <text:h text:style-name="P4" text:outline-level="2">References</text:h>
      <text:list xml:id="list2025288549" text:style-name="WWNum26">
        <text:list-item>
          <text:p text:style-name="P41">He K., Zhang X., Ren S., Sun J. (2016). <text:span text:style-name="Emphasis">Deep Residual Learning for Image Recognition</text:span>. CVPR.</text:p>
        </text:list-item>
        <text:list-item>
          <text:p text:style-name="P41">Tan M., Le Q. (2019). <text:span text:style-name="Emphasis">EfficientNet: Rethinking Model Scaling for Convolutional Neural Networks</text:span>. ICML.</text:p>
        </text:list-item>
        <text:list-item>
          <text:p text:style-name="P41">Vaswani A. et al. (2017). <text:span text:style-name="Emphasis">Attention Is All You Need</text:span>. NeurIPS.</text:p>
        </text:list-item>
        <text:list-item>
          <text:p text:style-name="P41"><text:soft-page-break/>Dosovitskiy A. et al. (2021). <text:span text:style-name="Emphasis">An Image is Worth 16x16 Words: Transformers for Image Recognition at Scale</text:span>. ICLR.</text:p>
        </text:list-item>
        <text:list-item>
          <text:p text:style-name="P41">Gong Y. et al. (2021). <text:span text:style-name="Emphasis">AST: Audio Spectrogram Transformer</text:span>. Interspeech.</text:p>
        </text:list-item>
        <text:list-item>
          <text:p text:style-name="P41">Waite H. D. (2002). <text:span text:style-name="Emphasis">Sonar for Practising Engineers</text:span>, 3rd Edition, Wiley.</text:p>
        </text:list-item>
        <text:list-item>
          <text:p text:style-name="P41">Urick R. J. (1983). <text:span text:style-name="Emphasis">Principles of Underwater Sound</text:span>, 3rd Edition, McGraw-Hill.</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2">This is actually the <text:span text:style-name="Strong_20_Emphasis">best way to prepare for your guide/viva</text:span>. Don't memorize big definitions. First understand <text:span text:style-name="Strong_20_Emphasis">what problem each model is trying to solve</text:span>.</text:p>
      <text:p text:style-name="P49">I'll explain it as if you are a <text:span text:style-name="Strong_20_Emphasis">5th class student</text:span>, but I'll also tell you <text:span text:style-name="Strong_20_Emphasis">what to say to your guide</text:span>.</text:p>
      <text:h text:style-name="P3" text:outline-level="1">First understand YOUR PROJECT</text:h>
      <text:p text:style-name="P49">Your project:</text:p>
      <text:p text:style-name="P10">We have sonar signals collected underwater. We must tell whether a ship is present or not.</text:p>
      <text:p text:style-name="P49">Your dataset has</text:p>
      <text:list xml:id="list1041400662" text:style-name="L1">
        <text:list-item>
          <text:p text:style-name="P43">X-axis = Time</text:p>
        </text:list-item>
        <text:list-item>
          <text:p text:style-name="P43">Y-axis = Frequency</text:p>
        </text:list-item>
        <text:list-item>
          <text:p text:style-name="P43">Colors = Signal energy (how strong the signal is)</text:p>
        </text:list-item>
      </text:list>
      <text:p text:style-name="P49">This creates a <text:span text:style-name="Strong_20_Emphasis">spectrogram image</text:span>.</text:p>
      <text:p text:style-name="P49">It looks something like this:</text:p>
      <text:p text:style-name="P8"><text:span text:style-name="Source_20_Text">Frequency ↑</text:span></text:p>
      <text:p text:style-name="P8"><text:soft-page-break/></text:p>
      <text:p text:style-name="P8"><text:span text:style-name="Source_20_Text">8000 | <text:s text:c="5"/>****</text:span></text:p>
      <text:p text:style-name="P8"><text:span text:style-name="Source_20_Text">6000 | <text:s text:c="3"/>*** <text:s/>***</text:span></text:p>
      <text:p text:style-name="P8"><text:span text:style-name="Source_20_Text">4000 | <text:s/>** <text:s text:c="5"/>***</text:span></text:p>
      <text:p text:style-name="P8"><text:span text:style-name="Source_20_Text">2000 | *** <text:s text:c="7"/>***</text:span></text:p>
      <text:p text:style-name="P8"><text:span text:style-name="Source_20_Text"><text:s text:c="5"/>------------------&gt; Time</text:span></text:p>
      <text:p text:style-name="P9"/>
      <text:p text:style-name="P49">Think of it as a <text:span text:style-name="Strong_20_Emphasis">special photograph of sound</text:span>.</text:p>
      <text:p text:style-name="P49">Your model's job is:</text:p>
      <text:p text:style-name="P10">"Look at this sound picture and tell whether a ship is present."</text:p>
      <text:p text:style-name="P7"/>
      <text:h text:style-name="P3" text:outline-level="1">Why did your guide say CNN-LSTM is not suitable?</text:h>
      <text:p text:style-name="P49">Imagine this sentence:</text:p>
      <text:p text:style-name="P9"><text:span text:style-name="Source_20_Text">I am going to school today.</text:span></text:p>
      <text:p text:style-name="P49">To understand <text:span text:style-name="Strong_20_Emphasis">today</text:span>, you must remember previous words.</text:p>
      <text:p text:style-name="P49">This is <text:span text:style-name="Strong_20_Emphasis">sequential dependency</text:span>.</text:p>
      <text:p text:style-name="P49">LSTM is useful here.</text:p>
      <text:p text:style-name="P49">But your project is different.</text:p>
      <text:p text:style-name="P49">Your spectrogram is already a complete image.</text:p>
      <text:p text:style-name="P49">Like this:</text:p>
      <text:p text:style-name="P8"><text:span text:style-name="Source_20_Text">Time</text:span></text:p>
      <text:p text:style-name="P8"><text:span text:style-name="Source_20_Text">↓</text:span></text:p>
      <text:p text:style-name="P8"/>
      <text:p text:style-name="P8"><text:span text:style-name="Source_20_Text">□□□□□□□□□□</text:span></text:p>
      <text:p text:style-name="P8"/>
      <text:p text:style-name="P8"><text:span text:style-name="Source_20_Text">□□□□□□□□□□</text:span></text:p>
      <text:p text:style-name="P8"/>
      <text:p text:style-name="P8"><text:span text:style-name="Source_20_Text">□□□□□□□□□□</text:span></text:p>
      <text:p text:style-name="P8"/>
      <text:p text:style-name="P9"><text:span text:style-name="Source_20_Text">Frequency →</text:span></text:p>
      <text:p text:style-name="P49">The model only needs to see patterns.</text:p>
      <text:p text:style-name="P49">It doesn't need to remember previous information.</text:p>
      <text:p text:style-name="P49">So your guide said:</text:p>
      <text:p text:style-name="P10">"We don't need long sequential memory. We need image understanding."</text:p>
      <text:p text:style-name="P49">That's why:</text:p>
      <text:p text:style-name="P49">❌ CNN-LSTM</text:p>
      <text:p text:style-name="P49"><text:soft-page-break/>✅ ResNet</text:p>
      <text:p text:style-name="P49">✅ EfficientNet</text:p>
      <text:p text:style-name="P49">✅ Attention</text:p>
      <text:p text:style-name="P49">✅ Transformers</text:p>
      <text:p text:style-name="P49">✅ AST</text:p>
      <text:p text:style-name="P7"/>
      <text:h text:style-name="P3" text:outline-level="1">1. RESNET</text:h>
      <text:h text:style-name="P3" text:outline-level="1">Think like this</text:h>
      <text:p text:style-name="P49">Suppose a teacher gives you a huge 500-page book.</text:p>
      <text:p text:style-name="P49">If you forget page 1 while reading page 500, you'll get confused.</text:p>
      <text:p text:style-name="P49">Similarly, deep networks forget earlier information.</text:p>
      <text:p text:style-name="P49">ResNet says:</text:p>
      <text:p text:style-name="P10">"Don't forget old information. Keep sending it to future layers."</text:p>
      <text:p text:style-name="P7"/>
      <text:h text:style-name="P3" text:outline-level="1">What is a residual connection?</text:h>
      <text:p text:style-name="P49">Normal CNN</text:p>
      <text:p text:style-name="P8"><text:span text:style-name="Source_20_Text">Input</text:span></text:p>
      <text:p text:style-name="P8"/>
      <text:p text:style-name="P8"><text:span text:style-name="Source_20_Text">↓</text:span></text:p>
      <text:p text:style-name="P8"/>
      <text:p text:style-name="P8"><text:span text:style-name="Source_20_Text">Layer1</text:span></text:p>
      <text:p text:style-name="P8"/>
      <text:p text:style-name="P8"><text:span text:style-name="Source_20_Text">↓</text:span></text:p>
      <text:p text:style-name="P8"/>
      <text:p text:style-name="P8"><text:span text:style-name="Source_20_Text">Layer2</text:span></text:p>
      <text:p text:style-name="P8"/>
      <text:p text:style-name="P8"><text:span text:style-name="Source_20_Text">↓</text:span></text:p>
      <text:p text:style-name="P8"/>
      <text:p text:style-name="P8"><text:span text:style-name="Source_20_Text">Layer3</text:span></text:p>
      <text:p text:style-name="P8"/>
      <text:p text:style-name="P8"><text:span text:style-name="Source_20_Text">↓</text:span></text:p>
      <text:p text:style-name="P8"/>
      <text:p text:style-name="P9"><text:span text:style-name="Source_20_Text">Output</text:span></text:p>
      <text:p text:style-name="P49">ResNet</text:p>
      <text:p text:style-name="P8"><text:span text:style-name="Source_20_Text">Input</text:span></text:p>
      <text:p text:style-name="P8"/>
      <text:p text:style-name="P8"><text:span text:style-name="Source_20_Text">↓</text:span></text:p>
      <text:p text:style-name="P8"/>
      <text:p text:style-name="P8"><text:span text:style-name="Source_20_Text">Layer1</text:span></text:p>
      <text:p text:style-name="P8"><text:soft-page-break/></text:p>
      <text:p text:style-name="P8"><text:span text:style-name="Source_20_Text">↓</text:span></text:p>
      <text:p text:style-name="P8"/>
      <text:p text:style-name="P8"><text:span text:style-name="Source_20_Text">Layer2</text:span></text:p>
      <text:p text:style-name="P8"/>
      <text:p text:style-name="P8"><text:span text:style-name="Source_20_Text">↘</text:span></text:p>
      <text:p text:style-name="P8"/>
      <text:p text:style-name="P8"><text:span text:style-name="Source_20_Text"><text:s/>+ ------------</text:span></text:p>
      <text:p text:style-name="P8"/>
      <text:p text:style-name="P8"><text:span text:style-name="Source_20_Text">↓</text:span></text:p>
      <text:p text:style-name="P8"/>
      <text:p text:style-name="P9"><text:span text:style-name="Source_20_Text">Output</text:span></text:p>
      <text:p text:style-name="P49">It creates a shortcut.</text:p>
      <text:p text:style-name="P49">This is called a <text:span text:style-name="Strong_20_Emphasis">skip connection</text:span>.</text:p>
      <text:p text:style-name="P7"/>
      <text:h text:style-name="P3" text:outline-level="1">Why is this useful?</text:h>
      <text:p text:style-name="P49">Suppose layer 50 forgets something.</text:p>
      <text:p text:style-name="P49">The shortcut says:</text:p>
      <text:p text:style-name="P10">"No problem, I'll give you the original information."</text:p>
      <text:p text:style-name="P49">So learning becomes easier.</text:p>
      <text:p text:style-name="P7"/>
      <text:h text:style-name="P3" text:outline-level="1">How is it useful for YOUR project?</text:h>
      <text:p text:style-name="P49">Suppose your sonar spectrogram contains:</text:p>
      <text:p text:style-name="P8"><text:span text:style-name="Source_20_Text">Small harmonic line</text:span></text:p>
      <text:p text:style-name="P8"/>
      <text:p text:style-name="P8"><text:span text:style-name="Source_20_Text">Small wake pattern</text:span></text:p>
      <text:p text:style-name="P8"/>
      <text:p text:style-name="P9"><text:span text:style-name="Source_20_Text">Weak cavitation signal</text:span></text:p>
      <text:p text:style-name="P49">ResNet will not lose these small details.</text:p>
      <text:p text:style-name="P49">It can detect:</text:p>
      <text:p text:style-name="P49">✅ Propeller harmonics</text:p>
      <text:p text:style-name="P49">✅ Blade passing frequencies</text:p>
      <text:p text:style-name="P49">✅ Cavitation bursts</text:p>
      <text:p text:style-name="P49">✅ Wake turbulence</text:p>
      <text:p text:style-name="P7"/>
      <text:h text:style-name="P3" text:outline-level="1"><text:soft-page-break/>What to tell your guide</text:h>
      <text:p text:style-name="P49">Say:</text:p>
      <text:p text:style-name="P10">ResNet is useful because our sonar data is converted into spectrogram images. Residual connections prevent information loss and enable deep networks to learn weak ship signatures hidden inside ocean noise.</text:p>
      <text:p text:style-name="P7"/>
      <text:h text:style-name="P3" text:outline-level="1">2. EFFICIENTNET</text:h>
      <text:p text:style-name="P49">Imagine two students.</text:p>
      <text:p text:style-name="P49">Student 1:</text:p>
      <text:p text:style-name="P49">Studies 20 hours.</text:p>
      <text:p text:style-name="P49">Gets 90 marks.</text:p>
      <text:p text:style-name="P49">Student 2:</text:p>
      <text:p text:style-name="P49">Studies 5 hours.</text:p>
      <text:p text:style-name="P49">Gets 95 marks.</text:p>
      <text:p text:style-name="P49">Which student is smarter?</text:p>
      <text:p text:style-name="P49">Student 2.</text:p>
      <text:p text:style-name="P49">That's EfficientNet.</text:p>
      <text:p text:style-name="P49">It says:</text:p>
      <text:p text:style-name="P10">"Let's do more work using less power."</text:p>
      <text:p text:style-name="P7"/>
      <text:h text:style-name="P3" text:outline-level="1">Traditional CNN</text:h>
      <text:p text:style-name="P49">People only increase:</text:p>
      <text:list xml:id="list2028787842" text:style-name="L7">
        <text:list-item>
          <text:p text:style-name="P44">Layers</text:p>
        </text:list-item>
        <text:list-item>
          <text:p text:style-name="P44">Width</text:p>
        </text:list-item>
        <text:list-item>
          <text:p text:style-name="P44">Image size</text:p>
        </text:list-item>
      </text:list>
      <text:p text:style-name="P49">individually.</text:p>
      <text:p text:style-name="P7"/>
      <text:h text:style-name="P3" text:outline-level="1">EfficientNet says:</text:h>
      <text:p text:style-name="P49">Increase all three together.</text:p>
      <text:p text:style-name="P8"><text:soft-page-break/><text:span text:style-name="Source_20_Text">Depth</text:span></text:p>
      <text:p text:style-name="P8"/>
      <text:p text:style-name="P8"><text:span text:style-name="Source_20_Text">+</text:span></text:p>
      <text:p text:style-name="P8"/>
      <text:p text:style-name="P8"><text:span text:style-name="Source_20_Text">Width</text:span></text:p>
      <text:p text:style-name="P8"/>
      <text:p text:style-name="P8"><text:span text:style-name="Source_20_Text">+</text:span></text:p>
      <text:p text:style-name="P8"/>
      <text:p text:style-name="P9"><text:span text:style-name="Source_20_Text">Resolution</text:span></text:p>
      <text:p text:style-name="P49">This is called <text:span text:style-name="Strong_20_Emphasis">compound scaling</text:span>.</text:p>
      <text:p text:style-name="P7"/>
      <text:h text:style-name="P3" text:outline-level="1">Why is this useful?</text:h>
      <text:p text:style-name="P49">It gives:</text:p>
      <text:list xml:id="list2441570953" text:style-name="L8">
        <text:list-item>
          <text:p text:style-name="P45">High accuracy</text:p>
        </text:list-item>
        <text:list-item>
          <text:p text:style-name="P45">Less memory</text:p>
        </text:list-item>
        <text:list-item>
          <text:p text:style-name="P45">Faster training</text:p>
        </text:list-item>
      </text:list>
      <text:p text:style-name="P7"/>
      <text:h text:style-name="P3" text:outline-level="1">Why useful for YOUR project?</text:h>
      <text:p text:style-name="P49">Suppose a ship is very far away.</text:p>
      <text:p text:style-name="P49">Signal is weak.</text:p>
      <text:p text:style-name="P49">EfficientNet can still identify:</text:p>
      <text:list xml:id="list3147602604" text:style-name="L9">
        <text:list-item>
          <text:p text:style-name="P46">Small harmonic patterns</text:p>
        </text:list-item>
        <text:list-item>
          <text:p text:style-name="P46">Weak wake structures</text:p>
        </text:list-item>
      </text:list>
      <text:p text:style-name="P49">without using huge computational power.</text:p>
      <text:p text:style-name="P7"/>
      <text:h text:style-name="P3" text:outline-level="1">What to tell your guide</text:h>
      <text:p text:style-name="P49">Say:</text:p>
      <text:p text:style-name="P10">EfficientNet is suitable because it provides high accuracy with fewer parameters and can be deployed in real-time naval systems.</text:p>
      <text:p text:style-name="P7"/>
      <text:h text:style-name="P3" text:outline-level="1">3. ATTENTION MECHANISM</text:h>
      <text:p text:style-name="P49">Suppose your teacher says:</text:p>
      <text:p text:style-name="P49"><text:soft-page-break/>"Find the important word."</text:p>
      <text:p text:style-name="P49">Sentence:</text:p>
      <text:p text:style-name="P9"><text:span text:style-name="Source_20_Text">The ship is moving in the ocean.</text:span></text:p>
      <text:p text:style-name="P49">You don't read every word equally.</text:p>
      <text:p text:style-name="P49">You focus on:</text:p>
      <text:p text:style-name="P9"><text:span text:style-name="Source_20_Text">SHIP</text:span></text:p>
      <text:p text:style-name="P49">Attention does the same.</text:p>
      <text:p text:style-name="P7"/>
      <text:h text:style-name="P3" text:outline-level="1">In sonar spectrogram</text:h>
      <text:p text:style-name="P49">Most areas are noise.</text:p>
      <text:p text:style-name="P49">Only some areas are important.</text:p>
      <text:p text:style-name="P8"><text:span text:style-name="Source_20_Text">□□□□□□□□</text:span></text:p>
      <text:p text:style-name="P8"/>
      <text:p text:style-name="P8"><text:span text:style-name="Source_20_Text">□□■□□□□□</text:span></text:p>
      <text:p text:style-name="P8"/>
      <text:p text:style-name="P8"><text:span text:style-name="Source_20_Text">□□□□■□□□</text:span></text:p>
      <text:p text:style-name="P8"/>
      <text:p text:style-name="P8"><text:span text:style-name="Source_20_Text">□□□□□□■□</text:span></text:p>
      <text:p text:style-name="P9"/>
      <text:p text:style-name="P49">Attention says:</text:p>
      <text:p text:style-name="P10">"Ignore useless regions."</text:p>
      <text:p text:style-name="P10">"Focus on important regions."</text:p>
      <text:p text:style-name="P7"/>
      <text:h text:style-name="P3" text:outline-level="1">Q, K and V</text:h>
      <text:p text:style-name="P49">Imagine a library.</text:p>
      <text:p text:style-name="P49">Q = What am I searching for?</text:p>
      <text:p text:style-name="P49">K = Which book contains it?</text:p>
      <text:p text:style-name="P49">V = Actual information</text:p>
      <text:p text:style-name="P49">Simple example:</text:p>
      <text:p text:style-name="P49">Q:</text:p>
      <text:p text:style-name="P9"><text:span text:style-name="Source_20_Text">Find ship pattern</text:span></text:p>
      <text:p text:style-name="P49">K:</text:p>
      <text:p text:style-name="P9"><text:span text:style-name="Source_20_Text">Harmonic region</text:span></text:p>
      <text:p text:style-name="P49"><text:soft-page-break/>V:</text:p>
      <text:p text:style-name="P9"><text:span text:style-name="Source_20_Text">Actual harmonic information</text:span></text:p>
      <text:p text:style-name="P7"/>
      <text:h text:style-name="P3" text:outline-level="1">Why useful?</text:h>
      <text:p text:style-name="P49">It focuses on:</text:p>
      <text:list xml:id="list363372948" text:style-name="L10">
        <text:list-item>
          <text:p text:style-name="P47">Propeller harmonics</text:p>
        </text:list-item>
        <text:list-item>
          <text:p text:style-name="P47">Wake turbulence</text:p>
        </text:list-item>
        <text:list-item>
          <text:p text:style-name="P47">Cavitation bursts</text:p>
        </text:list-item>
      </text:list>
      <text:p text:style-name="P49">and ignores:</text:p>
      <text:list xml:id="list3354549715" text:style-name="L11">
        <text:list-item>
          <text:p text:style-name="P48">Ocean noise</text:p>
        </text:list-item>
        <text:list-item>
          <text:p text:style-name="P48">Fish noise</text:p>
        </text:list-item>
        <text:list-item>
          <text:p text:style-name="P48">Wave noise</text:p>
        </text:list-item>
      </text:list>
      <text:p text:style-name="P7"/>
      <text:h text:style-name="P3" text:outline-level="1">What to tell your guide</text:h>
      <text:p text:style-name="P49">Say:</text:p>
      <text:p text:style-name="P10">Attention automatically assigns higher importance to ship-related frequency regions while suppressing ocean background noise.</text:p>
      <text:p text:style-name="P7"/>
      <text:h text:style-name="P3" text:outline-level="1">4. TRANSFORMERS</text:h>
      <text:p text:style-name="P49">CNN looks at small neighborhoods.</text:p>
      <text:p text:style-name="P49">Transformer looks at the entire image.</text:p>
      <text:p text:style-name="P49">Suppose:</text:p>
      <text:p text:style-name="P8"><text:span text:style-name="Source_20_Text">A weak harmonic appears at 2 seconds</text:span></text:p>
      <text:p text:style-name="P8"/>
      <text:p text:style-name="P9"><text:span text:style-name="Source_20_Text">Another harmonic appears at 8 seconds</text:span></text:p>
      <text:p text:style-name="P49">CNN may not connect them.</text:p>
      <text:p text:style-name="P49">Transformer can.</text:p>
      <text:p text:style-name="P7"/>
      <text:h text:style-name="P3" text:outline-level="1"><text:soft-page-break/>How does it work?</text:h>
      <text:p text:style-name="P49">Step 1:</text:p>
      <text:p text:style-name="P49">Cut image into small pieces.</text:p>
      <text:p text:style-name="P8"><text:span text:style-name="Source_20_Text">□□□□□□□□</text:span></text:p>
      <text:p text:style-name="P8"/>
      <text:p text:style-name="P8"><text:span text:style-name="Source_20_Text">□□□□□□□□</text:span></text:p>
      <text:p text:style-name="P8"/>
      <text:p text:style-name="P8"><text:span text:style-name="Source_20_Text">↓↓↓↓↓↓↓↓</text:span></text:p>
      <text:p text:style-name="P8"/>
      <text:p text:style-name="P9"><text:span text:style-name="Source_20_Text">16 pieces</text:span></text:p>
      <text:p text:style-name="P49">These are called patches.</text:p>
      <text:p text:style-name="P7"/>
      <text:h text:style-name="P3" text:outline-level="1">Positional encoding</text:h>
      <text:p text:style-name="P49">Transformer asks:</text:p>
      <text:p text:style-name="P10">Where is this patch?</text:p>
      <text:p text:style-name="P49">It remembers its location.</text:p>
      <text:p text:style-name="P7"/>
      <text:h text:style-name="P3" text:outline-level="1">Self-attention</text:h>
      <text:p text:style-name="P49">Every patch talks to every other patch.</text:p>
      <text:p text:style-name="P49">Like:</text:p>
      <text:p text:style-name="P8"><text:span text:style-name="Source_20_Text">Patch 1 ↔ Patch 20</text:span></text:p>
      <text:p text:style-name="P8"/>
      <text:p text:style-name="P8"><text:span text:style-name="Source_20_Text">Patch 5 ↔ Patch 30</text:span></text:p>
      <text:p text:style-name="P8"/>
      <text:p text:style-name="P9"><text:span text:style-name="Source_20_Text">Patch 7 ↔ Patch 100</text:span></text:p>
      <text:p text:style-name="P49">This creates global understanding.</text:p>
      <text:p text:style-name="P7"/>
      <text:h text:style-name="P3" text:outline-level="1">Why useful?</text:h>
      <text:p text:style-name="P49">Suppose:</text:p>
      <text:p text:style-name="P49">Weak signal here</text:p>
      <text:p text:style-name="P49">↓</text:p>
      <text:p text:style-name="P49">Stronger signal later</text:p>
      <text:p text:style-name="P49">↓</text:p>
      <text:p text:style-name="P49"><text:soft-page-break/>Wake pattern later</text:p>
      <text:p text:style-name="P49">Transformer connects all three.</text:p>
      <text:p text:style-name="P7"/>
      <text:h text:style-name="P3" text:outline-level="1">What to tell your guide</text:h>
      <text:p text:style-name="P49">Say:</text:p>
      <text:p text:style-name="P10">Transformers learn global relationships across the entire spectrogram and can detect weak ship signatures distributed over time and frequency.</text:p>
      <text:p text:style-name="P7"/>
      <text:h text:style-name="P3" text:outline-level="1">5. AST (Audio Spectrogram Transformer)</text:h>
      <text:p text:style-name="P49">This is the most important one.</text:p>
      <text:p text:style-name="P49">AST is simply:</text:p>
      <text:p text:style-name="P10">Transformer specially designed for sound images.</text:p>
      <text:p text:style-name="P49">Normal Transformer:</text:p>
      <text:p text:style-name="P9"><text:span text:style-name="Source_20_Text">Made for text</text:span></text:p>
      <text:p text:style-name="P49">AST:</text:p>
      <text:p text:style-name="P9"><text:span text:style-name="Source_20_Text">Made for audio spectrograms</text:span></text:p>
      <text:p text:style-name="P7"/>
      <text:h text:style-name="P3" text:outline-level="1">AST pipeline</text:h>
      <text:p text:style-name="P8"><text:span text:style-name="Source_20_Text">Sonar Signal</text:span></text:p>
      <text:p text:style-name="P8"/>
      <text:p text:style-name="P8"><text:span text:style-name="Source_20_Text">↓</text:span></text:p>
      <text:p text:style-name="P8"/>
      <text:p text:style-name="P8"><text:span text:style-name="Source_20_Text">STFT</text:span></text:p>
      <text:p text:style-name="P8"/>
      <text:p text:style-name="P8"><text:span text:style-name="Source_20_Text">↓</text:span></text:p>
      <text:p text:style-name="P8"/>
      <text:p text:style-name="P8"><text:span text:style-name="Source_20_Text">Spectrogram</text:span></text:p>
      <text:p text:style-name="P8"/>
      <text:p text:style-name="P8"><text:span text:style-name="Source_20_Text">↓</text:span></text:p>
      <text:p text:style-name="P8"/>
      <text:p text:style-name="P8"><text:span text:style-name="Source_20_Text">Patch Embedding</text:span></text:p>
      <text:p text:style-name="P8"/>
      <text:p text:style-name="P8"><text:span text:style-name="Source_20_Text">↓</text:span></text:p>
      <text:p text:style-name="P8"/>
      <text:p text:style-name="P8"><text:span text:style-name="Source_20_Text">Transformer</text:span></text:p>
      <text:p text:style-name="P8"/>
      <text:p text:style-name="P8"><text:span text:style-name="Source_20_Text">↓</text:span></text:p>
      <text:p text:style-name="P8"/>
      <text:p text:style-name="P8"><text:span text:style-name="Source_20_Text">Attention</text:span></text:p>
      <text:p text:style-name="P8"><text:soft-page-break/></text:p>
      <text:p text:style-name="P8"><text:span text:style-name="Source_20_Text">↓</text:span></text:p>
      <text:p text:style-name="P8"/>
      <text:p text:style-name="P8"><text:span text:style-name="Source_20_Text">Target</text:span></text:p>
      <text:p text:style-name="P8"/>
      <text:p text:style-name="P8"><text:span text:style-name="Source_20_Text">or</text:span></text:p>
      <text:p text:style-name="P8"/>
      <text:p text:style-name="P9"><text:span text:style-name="Source_20_Text">No Target</text:span></text:p>
      <text:p text:style-name="P7"/>
      <text:h text:style-name="P3" text:outline-level="1">Why AST is perfect for YOUR project?</text:h>
      <text:p text:style-name="P49">Because your data already is:</text:p>
      <text:p text:style-name="P8"><text:span text:style-name="Source_20_Text">Time</text:span></text:p>
      <text:p text:style-name="P8"/>
      <text:p text:style-name="P8"><text:span text:style-name="Source_20_Text">Frequency</text:span></text:p>
      <text:p text:style-name="P8"/>
      <text:p text:style-name="P9"><text:span text:style-name="Source_20_Text">Signal energy</text:span></text:p>
      <text:p text:style-name="P49">Exactly what AST needs.</text:p>
      <text:p text:style-name="P7"/>
      <text:h text:style-name="P3" text:outline-level="1">AST can detect</text:h>
      <text:p text:style-name="P49">✅ Propeller harmonics</text:p>
      <text:p text:style-name="P49">✅ Blade passing frequencies</text:p>
      <text:p text:style-name="P49">✅ Cavitation bursts</text:p>
      <text:p text:style-name="P49">✅ Wake turbulence</text:p>
      <text:p text:style-name="P49">✅ Weak signals hidden in noise</text:p>
      <text:p text:style-name="P7"/>
      <text:h text:style-name="P3" text:outline-level="1">Final thing to say to your guide (very important)</text:h>
      <text:p text:style-name="P49"><text:span text:style-name="Strong_20_Emphasis">"Initially we considered CNN-LSTM. However, after further study we observed that our dataset is represented as time-frequency spectrogram images rather than purely sequential data. Therefore, models specialized for image understanding and global feature extraction are more appropriate. ResNet preserves important information using skip connections, EfficientNet provides high accuracy with fewer parameters, Attention mechanisms focus on important frequency regions, and Audio Spectrogram Transformers can learn global relationships across the entire spectrogram. Hence these architectures are more suitable for ship wake sonar target detection than CNN-LSTM."</text:span></text:p>
      <text:h text:style-name="P3" text:outline-level="1"><text:soft-page-break/>Easy one-line memory trick</text:h>
      <table:table table:name="Table2" table:style-name="Table2">
        <table:table-column table:style-name="Table2.A"/>
        <table:table-column table:style-name="Table2.B"/>
        <table:table-header-rows>
          <table:table-row>
            <table:table-cell table:style-name="Table2.A1" office:value-type="string">
              <text:p text:style-name="P15">Model</text:p>
            </table:table-cell>
            <table:table-cell table:style-name="Table2.A1" office:value-type="string">
              <text:p text:style-name="P15">Remember this sentence</text:p>
            </table:table-cell>
          </table:table-row>
        </table:table-header-rows>
        <table:table-row>
          <table:table-cell table:style-name="Table2.A1" office:value-type="string">
            <text:p text:style-name="P13">ResNet</text:p>
          </table:table-cell>
          <table:table-cell table:style-name="Table2.A1" office:value-type="string">
            <text:p text:style-name="P13">Don't forget old information</text:p>
          </table:table-cell>
        </table:table-row>
        <table:table-row>
          <table:table-cell table:style-name="Table2.A1" office:value-type="string">
            <text:p text:style-name="P13">EfficientNet</text:p>
          </table:table-cell>
          <table:table-cell table:style-name="Table2.A1" office:value-type="string">
            <text:p text:style-name="P13">Work smarter with less power</text:p>
          </table:table-cell>
        </table:table-row>
        <table:table-row>
          <table:table-cell table:style-name="Table2.A1" office:value-type="string">
            <text:p text:style-name="P13">Attention</text:p>
          </table:table-cell>
          <table:table-cell table:style-name="Table2.A1" office:value-type="string">
            <text:p text:style-name="P13">Focus only on important regions</text:p>
          </table:table-cell>
        </table:table-row>
        <table:table-row>
          <table:table-cell table:style-name="Table2.A1" office:value-type="string">
            <text:p text:style-name="P13">Transformer</text:p>
          </table:table-cell>
          <table:table-cell table:style-name="Table2.A1" office:value-type="string">
            <text:p text:style-name="P13">See the entire image at once</text:p>
          </table:table-cell>
        </table:table-row>
        <table:table-row>
          <table:table-cell table:style-name="Table2.A1" office:value-type="string">
            <text:p text:style-name="P13">AST</text:p>
          </table:table-cell>
          <table:table-cell table:style-name="Table2.A1" office:value-type="string">
            <text:p text:style-name="P13">Transformer specially made for sound images</text:p>
          </table:table-cell>
        </table:table-row>
      </table:table>
      <text:p text:style-name="P49"><text:span text:style-name="Strong_20_Emphasis">If your guide is strict, prepare one more thing:</text:span> <text:span text:style-name="Strong_20_Emphasis">"Why exactly AST &gt; CNN-LSTM for ship wake sonar signals?"</text:span>. This question is very likely to be asked in the next review.</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9T05:43:42.046963653</meta:creation-date>
    <dc:date>2026-06-19T05:43:51.685952467</dc:date>
    <meta:editing-duration>PT10S</meta:editing-duration>
    <meta:editing-cycles>1</meta:editing-cycles>
    <meta:document-statistic meta:table-count="2" meta:image-count="0" meta:object-count="0" meta:page-count="24" meta:paragraph-count="586" meta:word-count="2490" meta:character-count="16017" meta:non-whitespace-character-count="14187"/>
    <meta:generator>LibreOffice/7.3.7.2$Linux_X86_64 LibreOffice_project/30$Build-2</meta:generator>
  </office:meta>
</office:document-meta>
</file>