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6.51cm" fo:margin-left="0cm" fo:margin-top="0cm" fo:margin-bottom="0cm" table:align="left" style:writing-mode="lr-tb"/>
    </style:style>
    <style:style style:name="Table1.A" style:family="table-column">
      <style:table-column-properties style:column-width="1.235cm"/>
    </style:style>
    <style:style style:name="Table1.B" style:family="table-column">
      <style:table-column-properties style:column-width="4.233cm"/>
    </style:style>
    <style:style style:name="Table1.C" style:family="table-column">
      <style:table-column-properties style:column-width="5.396cm"/>
    </style:style>
    <style:style style:name="Table1.D" style:family="table-column">
      <style:table-column-properties style:column-width="5.644cm"/>
    </style:style>
    <style:style style:name="Table1.1" style:family="table-row">
      <style:table-row-properties fo:keep-together="auto"/>
    </style:style>
    <style:style style:name="Table1.A1" style:family="table-cell">
      <style:table-cell-properties fo:background-color="#1b3a6b" fo:padding-left="0.212cm" fo:padding-right="0.141cm" fo:padding-top="0.141cm" fo:padding-bottom="0.141cm" fo:border="none">
        <style:background-image/>
      </style:table-cell-properties>
    </style:style>
    <style:style style:name="Table1.A2" style:family="table-cell">
      <style:table-cell-properties fo:background-color="#ffffff" fo:padding-left="0.212cm" fo:padding-right="0.141cm" fo:padding-top="0.123cm" fo:padding-bottom="0.123cm" fo:border="0.5pt solid #cbd5e1">
        <style:background-image/>
      </style:table-cell-properties>
    </style:style>
    <style:style style:name="Table1.A3" style:family="table-cell">
      <style:table-cell-properties fo:background-color="#f1f5f9" fo:padding-left="0.212cm" fo:padding-right="0.141cm" fo:padding-top="0.123cm" fo:padding-bottom="0.123cm" fo:border="0.5pt solid #cbd5e1">
        <style:background-image/>
      </style:table-cell-properties>
    </style:style>
    <style:style style:name="Table2" style:family="table">
      <style:table-properties style:width="16.51cm" fo:margin-left="0cm" fo:margin-top="0cm" fo:margin-bottom="0cm" table:align="left" style:writing-mode="lr-tb"/>
    </style:style>
    <style:style style:name="Table2.A" style:family="table-column">
      <style:table-column-properties style:column-width="3.704cm"/>
    </style:style>
    <style:style style:name="Table2.B" style:family="table-column">
      <style:table-column-properties style:column-width="2.999cm"/>
    </style:style>
    <style:style style:name="Table2.C" style:family="table-column">
      <style:table-column-properties style:column-width="2.997cm"/>
    </style:style>
    <style:style style:name="Table2.E" style:family="table-column">
      <style:table-column-properties style:column-width="3.812cm"/>
    </style:style>
    <style:style style:name="Table2.1" style:family="table-row">
      <style:table-row-properties fo:keep-together="auto"/>
    </style:style>
    <style:style style:name="Table2.A1" style:family="table-cell">
      <style:table-cell-properties fo:background-color="#0e7490" fo:padding-left="0.176cm" fo:padding-right="0.106cm" fo:padding-top="0.141cm" fo:padding-bottom="0.141cm" fo:border="none">
        <style:background-image/>
      </style:table-cell-properties>
    </style:style>
    <style:style style:name="Table2.A2" style:family="table-cell">
      <style:table-cell-properties fo:background-color="#ffffff" fo:padding-left="0.176cm" fo:padding-right="0.106cm" fo:padding-top="0.123cm" fo:padding-bottom="0.123cm" fo:border="0.5pt solid #cbd5e1">
        <style:background-image/>
      </style:table-cell-properties>
    </style:style>
    <style:style style:name="Table2.A3" style:family="table-cell">
      <style:table-cell-properties fo:background-color="#f1f5f9" fo:padding-left="0.176cm" fo:padding-right="0.106cm" fo:padding-top="0.123cm" fo:padding-bottom="0.123cm" fo:border="0.5pt solid #cbd5e1">
        <style:background-image/>
      </style:table-cell-properties>
    </style:style>
    <style:style style:name="Table3" style:family="table">
      <style:table-properties style:width="16.51cm" fo:margin-left="0.009cm" fo:margin-top="0cm" fo:margin-bottom="0cm" table:align="left" style:writing-mode="lr-tb"/>
    </style:style>
    <style:style style:name="Table3.A" style:family="table-column">
      <style:table-column-properties style:column-width="0.88cm"/>
    </style:style>
    <style:style style:name="Table3.B" style:family="table-column">
      <style:table-column-properties style:column-width="15.628cm"/>
    </style:style>
    <style:style style:name="Table3.1" style:family="table-row">
      <style:table-row-properties fo:keep-together="auto"/>
    </style:style>
    <style:style style:name="Table3.A1" style:family="table-cell">
      <style:table-cell-properties fo:background-color="#dbeafe" fo:padding-left="0.176cm" fo:padding-right="0.106cm" fo:padding-top="0.106cm" fo:padding-bottom="0.106cm" fo:border="0.5pt solid #cbd5e1">
        <style:background-image/>
      </style:table-cell-properties>
    </style:style>
    <style:style style:name="Table3.B1" style:family="table-cell">
      <style:table-cell-properties fo:background-color="#ffffff" fo:padding-left="0.212cm" fo:padding-right="0.141cm" fo:padding-top="0.106cm" fo:padding-bottom="0.106cm" fo:border="0.5pt solid #cbd5e1">
        <style:background-image/>
      </style:table-cell-properties>
    </style:style>
    <style:style style:name="Table3.B2" style:family="table-cell">
      <style:table-cell-properties fo:background-color="#f1f5f9" fo:padding-left="0.212cm" fo:padding-right="0.141cm" fo:padding-top="0.106cm" fo:padding-bottom="0.106cm" fo:border="0.5pt solid #cbd5e1">
        <style:background-image/>
      </style:table-cell-properties>
    </style:style>
    <style:style style:name="P1" style:family="paragraph" style:parent-style-name="Heading_20_1">
      <style:paragraph-properties fo:margin-top="0.529cm" fo:margin-bottom="0.212cm" style:contextual-spacing="false" fo:break-before="page"/>
    </style:style>
    <style:style style:name="P2" style:family="paragraph" style:parent-style-name="Heading_20_1">
      <style:paragraph-properties fo:margin-top="0.529cm" fo:margin-bottom="0.212cm" style:contextual-spacing="false"/>
    </style:style>
    <style:style style:name="P3" style:family="paragraph" style:parent-style-name="Heading_20_2">
      <style:paragraph-properties fo:margin-top="0.529cm" fo:margin-bottom="0.212cm" style:contextual-spacing="false"/>
    </style:style>
    <style:style style:name="P4" style:family="paragraph" style:parent-style-name="Standard">
      <style:paragraph-properties fo:margin-top="0cm" fo:margin-bottom="0cm" style:contextual-spacing="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fo:padding-left="0cm" fo:padding-right="0cm" fo:padding-top="0cm" fo:padding-bottom="0.071cm" fo:border-left="none" fo:border-right="none" fo:border-top="none" fo:border-bottom="3pt solid #2563eb"/>
    </style:style>
    <style:style style:name="P7" style:family="paragraph" style:parent-style-name="Standard">
      <style:paragraph-properties fo:text-align="center" style:justify-single-word="false" fo:orphans="0" fo:widows="0"/>
    </style:style>
    <style:style style:name="P8" style:family="paragraph" style:parent-style-name="Standard">
      <style:paragraph-properties fo:margin-top="0.106cm" fo:margin-bottom="0.176cm" style:contextual-spacing="false" fo:line-height="0.487cm"/>
    </style:style>
    <style:style style:name="P9" style:family="paragraph" style:parent-style-name="Standard">
      <style:paragraph-properties fo:margin-top="0.212cm" fo:margin-bottom="0.212cm" style:contextual-spacing="false" fo:padding-left="0cm" fo:padding-right="0cm" fo:padding-top="0cm" fo:padding-bottom="0.035cm" fo:border-left="none" fo:border-right="none" fo:border-top="none" fo:border-bottom="0.51pt solid #2563eb"/>
    </style:style>
    <style:style style:name="P10" style:family="paragraph" style:parent-style-name="Standard">
      <style:paragraph-properties fo:margin-left="0.847cm" fo:margin-right="0cm" fo:margin-top="0.071cm" fo:margin-bottom="0.071cm" style:contextual-spacing="false" fo:line-height="0.459cm" fo:text-indent="-0.423cm" style:auto-text-indent="false"/>
    </style:style>
    <style:style style:name="P11" style:family="paragraph" style:parent-style-name="Standard">
      <style:paragraph-properties fo:margin-left="0.847cm" fo:margin-right="0cm" fo:margin-top="0.071cm" fo:margin-bottom="0.141cm" style:contextual-spacing="false" fo:line-height="0.459cm" fo:text-indent="-0.847cm" style:auto-text-indent="false"/>
    </style:style>
    <style:style style:name="P12" style:family="paragraph" style:parent-style-name="Standard">
      <style:paragraph-properties fo:orphans="0" fo:widows="0"/>
    </style:style>
    <style:style style:name="T1" style:family="text">
      <style:text-properties fo:color="#1b3a6b" loext:opacity="100%" style:font-name="Arial" fo:font-size="26pt" fo:font-weight="bold" style:font-name-asian="Arial2" style:font-size-asian="26pt" style:font-weight-asian="bold" style:font-name-complex="Arial2" style:font-size-complex="26pt" style:font-weight-complex="bold"/>
    </style:style>
    <style:style style:name="T2" style:family="text">
      <style:text-properties fo:color="#1b3a6b" loext:opacity="100%" style:font-name="Arial" fo:font-size="11pt" fo:font-weight="bold" style:font-name-asian="Arial2" style:font-size-asian="11pt" style:font-weight-asian="bold" style:font-name-complex="Arial2" style:font-size-complex="11pt" style:font-weight-complex="bold"/>
    </style:style>
    <style:style style:name="T3" style:family="text">
      <style:text-properties fo:color="#1b3a6b" loext:opacity="100%" style:font-name="Arial" fo:font-size="20pt" fo:font-weight="bold" style:font-name-asian="Arial2" style:font-size-asian="20pt" style:font-weight-asian="bold" style:font-name-complex="Arial2" style:font-size-complex="20pt" style:font-weight-complex="bold"/>
    </style:style>
    <style:style style:name="T4" style:family="text">
      <style:text-properties fo:color="#1b3a6b" loext:opacity="100%" style:font-name="Arial" fo:font-size="15pt" fo:font-weight="bold" style:font-name-asian="Arial2" style:font-size-asian="15pt" style:font-weight-asian="bold" style:font-name-complex="Arial2" style:font-size-complex="15pt" style:font-weight-complex="bold"/>
    </style:style>
    <style:style style:name="T5" style:family="text">
      <style:text-properties fo:color="#1b3a6b" loext:opacity="100%" style:font-name="Arial" fo:font-size="9pt" fo:font-weight="bold" style:font-name-asian="Arial2" style:font-size-asian="9pt" style:font-weight-asian="bold" style:font-name-complex="Arial2" style:font-size-complex="9pt" style:font-weight-complex="bold"/>
    </style:style>
    <style:style style:name="T6" style:family="text">
      <style:text-properties fo:color="#0e7490" loext:opacity="100%" style:font-name="Arial" fo:font-size="18pt" fo:font-weight="bold" style:font-name-asian="Arial2" style:font-size-asian="18pt" style:font-weight-asian="bold" style:font-name-complex="Arial2" style:font-size-complex="18pt" style:font-weight-complex="bold"/>
    </style:style>
    <style:style style:name="T7" style:family="text">
      <style:text-properties fo:color="#0e7490" loext:opacity="100%" style:font-name="Arial" fo:font-size="15pt" fo:font-weight="bold" style:font-name-asian="Arial2" style:font-size-asian="15pt" style:font-weight-asian="bold" style:font-name-complex="Arial2" style:font-size-complex="15pt" style:font-weight-complex="bold"/>
    </style:style>
    <style:style style:name="T8" style:family="text">
      <style:text-properties fo:color="#334155" loext:opacity="100%" style:font-name="Arial" fo:font-size="11pt" style:font-name-asian="Arial2" style:font-size-asian="11pt" style:font-name-complex="Arial2" style:font-size-complex="11pt"/>
    </style:style>
    <style:style style:name="T9" style:family="text">
      <style:text-properties fo:color="#334155" loext:opacity="100%" style:font-name="Arial" fo:font-size="11pt" fo:font-weight="normal" style:font-name-asian="Arial2" style:font-size-asian="11pt" style:font-weight-asian="normal" style:font-name-complex="Arial2" style:font-size-complex="11pt" style:font-weight-complex="normal"/>
    </style:style>
    <style:style style:name="T10" style:family="text">
      <style:text-properties fo:color="#334155" loext:opacity="100%" style:font-name="Arial" fo:font-size="9.5pt" style:font-name-asian="Arial2" style:font-size-asian="9.5pt" style:font-name-complex="Arial2" style:font-size-complex="9.5pt"/>
    </style:style>
    <style:style style:name="T11" style:family="text">
      <style:text-properties fo:color="#334155" loext:opacity="100%" style:font-name="Arial" fo:font-size="9.5pt" fo:font-weight="normal" style:font-name-asian="Arial2" style:font-size-asian="9.5pt" style:font-weight-asian="normal" style:font-name-complex="Arial2" style:font-size-complex="9.5pt" style:font-weight-complex="normal"/>
    </style:style>
    <style:style style:name="T12" style:family="text">
      <style:text-properties fo:color="#334155" loext:opacity="100%" style:font-name="Arial" fo:font-size="9.5pt" fo:font-weight="bold" style:font-name-asian="Arial2" style:font-size-asian="9.5pt" style:font-weight-asian="bold" style:font-name-complex="Arial2" style:font-size-complex="9.5pt" style:font-weight-complex="bold"/>
    </style:style>
    <style:style style:name="T13" style:family="text">
      <style:text-properties fo:color="#334155" loext:opacity="100%" style:font-name="Arial" fo:font-size="9pt" style:font-name-asian="Arial2" style:font-size-asian="9pt" style:font-name-complex="Arial2" style:font-size-complex="9pt"/>
    </style:style>
    <style:style style:name="T14" style:family="text">
      <style:text-properties fo:color="#2563eb" loext:opacity="100%" style:font-name="Arial" fo:font-size="11pt" style:font-name-asian="Arial2" style:font-size-asian="11pt" style:font-name-complex="Arial2" style:font-size-complex="11pt"/>
    </style:style>
    <style:style style:name="T15" style:family="text">
      <style:text-properties fo:color="#0f172a" loext:opacity="100%" style:font-name="Arial" fo:font-size="11pt" fo:font-weight="bold" style:font-name-asian="Arial2" style:font-size-asian="11pt" style:font-weight-asian="bold" style:font-name-complex="Arial2" style:font-size-complex="11pt" style:font-weight-complex="bold"/>
    </style:style>
    <style:style style:name="T16" style:family="text">
      <style:text-properties fo:color="#475569" loext:opacity="100%" style:font-name="Arial" fo:font-size="9.5pt" style:font-name-asian="Arial2" style:font-size-asian="9.5pt" style:font-name-complex="Arial2" style:font-size-complex="9.5pt"/>
    </style:style>
    <style:style style:name="T17" style:family="text">
      <style:text-properties fo:color="#ffffff" loext:opacity="100%" style:font-name="Arial" fo:font-size="10pt" fo:font-weight="bold" style:font-name-asian="Arial2" style:font-size-asian="10pt" style:font-weight-asian="bold" style:font-name-complex="Arial2" style:font-size-complex="1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5"><text:span text:style-name="T1">LITERATURE SURVEY REPORT</text:span></text:p>
      <text:p text:style-name="P4"/>
      <text:p text:style-name="P6"/>
      <text:p text:style-name="P4"/>
      <text:p text:style-name="P5"><text:span text:style-name="T6">Underwater Sonar Signal-Based Target Detection</text:span></text:p>
      <text:p text:style-name="P4"/>
      <text:p text:style-name="P5"><text:span text:style-name="T7">Using Machine Learning and Deep Learning Techniques</text:span></text:p>
      <text:p text:style-name="P4"/>
      <text:p text:style-name="P4"/>
      <text:p text:style-name="P5"><text:span text:style-name="T8">Wake Homing Project <text:s/>| <text:s/>Binary Classification: Target Ship (1) vs No Target (0)</text:span></text:p>
      <text:p text:style-name="P4"/>
      <text:p text:style-name="P4"/>
      <text:p text:style-name="P4"/>
      <text:p text:style-name="P5"><text:span text:style-name="T2">Submitted By: [Your Name]</text:span></text:p>
      <text:p text:style-name="P5"><text:span text:style-name="T8">Guide: [Guide Name]</text:span></text:p>
      <text:p text:style-name="P5"><text:span text:style-name="T8">Date: June 2025</text:span></text:p>
      <text:p text:style-name="P4"/>
      <text:p text:style-name="P4"/>
      <text:p text:style-name="P5"><text:span text:style-name="T8">[Department / Institution Name]</text:span></text:p>
      <text:p text:style-name="Standard"/>
      <text:h text:style-name="P1" text:outline-level="1"><text:span text:style-name="T3">1. Introduction</text:span></text:h>
      <text:p text:style-name="P8"><text:span text:style-name="T9">Underwater acoustic target detection is one of the most challenging problems in naval defence and maritime security. The ability to detect and classify a target ship by analysing the acoustic wake it generates — instead of emitting an active sonar pulse — is at the core of passive wake homing torpedo guidance systems. This literature survey presents the state-of-the-art techniques in sonar signal processing, feature extraction, and machine learning / deep learning classification that are directly applicable to building a reliable binary classifier: Target Ship (1) vs. No Target (0).</text:span></text:p>
      <text:p text:style-name="P4"/>
      <text:p text:style-name="P8"><text:span text:style-name="T9">The primary challenge lies in the low Signal-to-Noise Ratio (SNR) of ocean environments, which contain ambient noise from waves, marine life, shipping traffic, and thermal gradients. Modern data-driven approaches using ML and DL have demonstrated superior performance over traditional threshold-based detectors and are the recommended choice for this project.</text:span></text:p>
      <text:p text:style-name="P9"/>
      <text:h text:style-name="P2" text:outline-level="1"><text:span text:style-name="T3">2. Problem Statement</text:span></text:h>
      <text:p text:style-name="P8"><text:span text:style-name="T9">The wake homing system receives a time-series acoustic signal from hydrophone sensors deployed in the underwater medium. Each signal window must be classified as:</text:span></text:p>
      <text:p text:style-name="P10"><text:span text:style-name="T14">• </text:span><text:span text:style-name="T8">Class 1 – Target Detected: Acoustic signature consistent with a ship wake (propeller harmonics, turbulence, cavitation, hull noise).</text:span></text:p>
      <text:p text:style-name="P10"><text:span text:style-name="T14">• </text:span><text:span text:style-name="T8">Class 0 – No Target: Background ocean ambient noise, biological noise, or other non-ship sources.</text:span></text:p>
      <text:p text:style-name="P4"/>
      <text:p text:style-name="P8"><text:span text:style-name="T9">This is a supervised binary classification problem on time-series sonar data, requiring robust preprocessing, discriminative feature engineering, and accurate classification models that operate in real time.</text:span></text:p>
      <text:p text:style-name="P9"/>
      <text:h text:style-name="P2" text:outline-level="1"><text:span text:style-name="T3">3. Underwater Sonar Signal Characteristics</text:span></text:h>
      <text:p text:style-name="P8"><text:span text:style-name="T9">Understanding the physical properties of ship-radiated noise is essential before choosing signal processing techniques.</text:span></text:p>
      <text:h text:style-name="P3" text:outline-level="2"><text:span text:style-name="T4">3.1 <text:s/>Ship Wake Acoustic Signature</text:span></text:h>
      <text:p text:style-name="P8"><text:span text:style-name="T9">A target ship generates acoustic energy through multiple mechanisms. The dominant sources are:</text:span></text:p>
      <text:p text:style-name="P10"><text:span text:style-name="T14">• </text:span><text:span text:style-name="T15"><text:s/>The most prominent source. Propeller blades generate tonal harmonics at the blade-passing frequency (BPF = RPM × number of blades / 60). These harmonics are detectable even at long ranges.</text:span><text:span text:style-name="T8">Propeller Noise:</text:span></text:p>
      <text:p text:style-name="P10"><text:span text:style-name="T14">• </text:span><text:span text:style-name="T15"><text:s/>When propeller blade tips move faster than a threshold, micro-bubbles form and collapse, creating broad-band noise with high-energy bursts (20 Hz – 50 kHz).</text:span><text:span text:style-name="T8">Cavitation:</text:span></text:p>
      <text:p text:style-name="P10"><text:span text:style-name="T14">• </text:span><text:span text:style-name="T15"><text:s/>Diesel engines, pumps, and gearboxes radiate tonal narrowband noise in the range 20–2000 Hz.</text:span><text:span text:style-name="T8">Hull/Machinery Noise:</text:span></text:p>
      <text:p text:style-name="P10"><text:soft-page-break/><text:span text:style-name="T14">• </text:span><text:span text:style-name="T15"><text:s/>The turbulent wake behind a ship generates low-frequency flow noise (&lt; 200 Hz).</text:span><text:span text:style-name="T8">Wake Turbulence:</text:span></text:p>
      <text:p text:style-name="P4"/>
      <text:p text:style-name="P11"><text:span text:style-name="T16">[R1] H. D. Waite, "Sonar for Practising Engineers," 3rd ed., Wiley, 2002.</text:span></text:p>
      <text:p text:style-name="P11"><text:span text:style-name="T16">[R2] R. J. Urick, "Principles of Underwater Sound," 3rd ed., McGraw-Hill, 1983.</text:span></text:p>
      <text:p text:style-name="P11"><text:span text:style-name="T16">[R3] IEEE Std 1241-2010, "IEEE Standard for Terminology and Test Methods for Analog-to-Digital Converters," IEEE, 2011.</text:span></text:p>
      <text:h text:style-name="P3" text:outline-level="2"><text:span text:style-name="T4">3.2 <text:s/>Background Ocean Noise</text:span></text:h>
      <text:p text:style-name="P8"><text:span text:style-name="T9">Ocean ambient noise follows the Wenz curves, which characterize noise level as a function of frequency. The key sources are shipping traffic (1–100 Hz), wind and wave action (100 Hz – 50 kHz), thermal noise (&gt; 30 kHz), and biological noise (clicks, whale songs). Any effective classifier must separate ship wake signals from this complex background.</text:span></text:p>
      <text:p text:style-name="P11"><text:span text:style-name="T16">[R4] G. M. Wenz, "Acoustic Ambient Noise in the Ocean: Spectra and Sources," J. Acoust. Soc. Am., vol. 34, no. 12, pp. 1936–1956, 1962.</text:span></text:p>
      <text:p text:style-name="P9"/>
      <text:h text:style-name="P2" text:outline-level="1"><text:span text:style-name="T3">4. Signal Preprocessing Techniques</text:span></text:h>
      <text:p text:style-name="P8"><text:span text:style-name="T9">Raw sonar signals contain significant noise and artefacts that must be removed before analysis. The following preprocessing pipeline is recommended for this project:</text:span></text:p>
      <text:h text:style-name="P3" text:outline-level="2"><text:span text:style-name="T4">4.1 <text:s/>DC Offset Removal and Amplitude Normalisation</text:span></text:h>
      <text:p text:style-name="P8"><text:span text:style-name="T9">Sensors introduce a DC bias that must be removed by zero-meaning each signal. Amplitude normalisation ensures that signals from different distances or sensor gains are comparable, preventing models from learning gain instead of shape.</text:span></text:p>
      <text:p text:style-name="P11"><text:span text:style-name="T16">[R5] A. V. Oppenheim and R. W. Schafer, "Discrete-Time Signal Processing," 3rd ed., Prentice Hall, 2010.</text:span></text:p>
      <text:h text:style-name="P3" text:outline-level="2"><text:span text:style-name="T4">4.2 <text:s/>Bandpass Filtering (Butterworth Filter)</text:span></text:h>
      <text:p text:style-name="P8"><text:span text:style-name="T9">A 4th-order Butterworth bandpass filter (20 Hz – 8 kHz) removes out-of-band interference. This band captures all relevant ship noise while rejecting high-frequency thermal noise and very low-frequency geological noise. The Butterworth design is chosen because it provides the flattest passband response with no ripple.</text:span></text:p>
      <text:p text:style-name="P11"><text:span text:style-name="T16">[R6] S. D. Stearns, "Digital Signal Processing with Examples in MATLAB," CRC Press, 2003.</text:span></text:p>
      <text:p text:style-name="P11"><text:span text:style-name="T16">[R7] IEEE Std 1057-2017, "IEEE Standard for Digitizing Waveforms – Digital Signal Conditioning," IEEE, 2017.</text:span></text:p>
      <text:h text:style-name="P3" text:outline-level="2"><text:span text:style-name="T4">4.3 <text:s/>Signal Segmentation and Windowing</text:span></text:h>
      <text:p text:style-name="P8"><text:span text:style-name="T9">Sonar recordings are segmented into fixed-length windows (e.g., 2048 or 4096 samples) using Hann or Hamming windows to avoid spectral leakage in frequency-domain analysis. Overlapping windows (50% overlap) increase the number of training samples and improve temporal resolution.</text:span></text:p>
      <text:p text:style-name="P11"><text:span text:style-name="T16">[R8] F. J. Harris, "On the Use of Windows for Harmonic Analysis with the Discrete Fourier Transform," Proc. IEEE, vol. 66, no. 1, pp. 51–83, 1978.</text:span></text:p>
      <text:p text:style-name="P9"/>
      <text:h text:style-name="P2" text:outline-level="1"><text:soft-page-break/><text:span text:style-name="T3">5. Feature Extraction Techniques</text:span></text:h>
      <text:p text:style-name="P8"><text:span text:style-name="T9">Feature extraction transforms the raw signal into a compact, discriminative representation. Both classical handcrafted features (for ML) and raw waveform input (for DL) are used in this project.</text:span></text:p>
      <text:h text:style-name="P3" text:outline-level="2"><text:span text:style-name="T4">5.1 <text:s/>Time-Domain Features</text:span></text:h>
      <text:p text:style-name="P8"><text:span text:style-name="T9">These features describe the statistical properties of the signal waveform. They are fast to compute and useful for basic classification. Key features include:</text:span></text:p>
      <text:p text:style-name="P10"><text:span text:style-name="T14">• </text:span><text:span text:style-name="T8">Root Mean Square (RMS) energy – measures overall signal power.</text:span></text:p>
      <text:p text:style-name="P10"><text:span text:style-name="T14">• </text:span><text:span text:style-name="T8">Peak amplitude and Crest Factor – distinguishes impulsive cavitation bursts.</text:span></text:p>
      <text:p text:style-name="P10"><text:span text:style-name="T14">• </text:span><text:span text:style-name="T8">Skewness and Kurtosis – quantify asymmetry and impulsiveness of the signal.</text:span></text:p>
      <text:p text:style-name="P10"><text:span text:style-name="T14">• </text:span><text:span text:style-name="T8">Zero-Crossing Rate (ZCR) – correlates with dominant frequency.</text:span></text:p>
      <text:p text:style-name="P10"><text:span text:style-name="T14">• </text:span><text:span text:style-name="T8">Shape Factor and Impulse Factor – detect propeller periodicity.</text:span></text:p>
      <text:p text:style-name="P4"/>
      <text:p text:style-name="P11"><text:span text:style-name="T16">[R9] B. Li, P. W. Tse, D. Wang, and X. Liang, "Fault Diagnosis of Rotating Machinery Using Frequency-Domain Features," Expert Systems with Applications, vol. 37, pp. 2360–2369, 2010.</text:span></text:p>
      <text:h text:style-name="P3" text:outline-level="2"><text:span text:style-name="T4">5.2 <text:s/>Frequency-Domain Features</text:span></text:h>
      <text:p text:style-name="P8"><text:span text:style-name="T9">Frequency-domain analysis reveals the harmonic structure of propeller noise, which is the most reliable identifier of a target ship.</text:span></text:p>
      <text:p text:style-name="P10"><text:span text:style-name="T14">• </text:span><text:span text:style-name="T8">Power Spectral Density (PSD) via Welch's method – estimates the power at each frequency.</text:span></text:p>
      <text:p text:style-name="P10"><text:span text:style-name="T14">• </text:span><text:span text:style-name="T8">Spectral Centroid – the 'centre of mass' of the spectrum; ship noise is lower than ocean noise.</text:span></text:p>
      <text:p text:style-name="P10"><text:span text:style-name="T14">• </text:span><text:span text:style-name="T8">Spectral Entropy – measures spectral complexity; target signals have lower entropy (structured harmonics).</text:span></text:p>
      <text:p text:style-name="P10"><text:span text:style-name="T14">• </text:span><text:span text:style-name="T8">Spectral Flatness (Wiener Entropy) – near 1 for noise; near 0 for tonal ship signals.</text:span></text:p>
      <text:p text:style-name="P10"><text:span text:style-name="T14">• </text:span><text:span text:style-name="T8">Dominant Frequency and Band Energy Ratios – energy in propeller frequency bands (20–500 Hz).</text:span></text:p>
      <text:p text:style-name="P4"/>
      <text:p text:style-name="P11"><text:span text:style-name="T16">[R10] P. D. Welch, "The Use of Fast Fourier Transform for the Estimation of Power Spectra," IEEE Trans. Audio Electroacoust., vol. 15, no. 2, pp. 70–73, 1967.</text:span></text:p>
      <text:p text:style-name="P11"><text:span text:style-name="T16">[R11] L. E. Kinsler, A. R. Frey, A. B. Coppens, and J. V. Sanders, "Fundamentals of Acoustics," 4th ed., Wiley, 2000.</text:span></text:p>
      <text:h text:style-name="P3" text:outline-level="2"><text:span text:style-name="T4">5.3 <text:s/>Time-Frequency Features: STFT and Spectrogram</text:span></text:h>
      <text:p text:style-name="P8"><text:span text:style-name="T9">The Short-Time Fourier Transform (STFT) provides both time and frequency information simultaneously. The resulting spectrogram visually shows how the frequency content changes over time, which is essential for detecting the periodic wake pattern behind a moving ship. The STFT-based features include mean, standard deviation, and energy of the magnitude spectrogram across sub-bands.</text:span></text:p>
      <text:p text:style-name="P11"><text:span text:style-name="T16">[R12] L. Cohen, "Time-Frequency Analysis," Prentice Hall, 1995.</text:span></text:p>
      <text:p text:style-name="P11"><text:span text:style-name="T16">[R13] P. Flandrin, "Time-Frequency / Time-Scale Analysis," Academic Press, 1999.</text:span></text:p>
      <text:h text:style-name="P3" text:outline-level="2"><text:span text:style-name="T4">5.4 <text:s/>Mel-Frequency Cepstral Coefficients (MFCCs)</text:span></text:h>
      <text:p text:style-name="P8"><text:span text:style-name="T9">Originally developed for speech recognition, MFCCs are also effective for sonar signal classification. They represent the spectral envelope on a perceptual Mel scale that approximates the non-linear </text:span><text:soft-page-break/><text:span text:style-name="T9">frequency resolution of biological hearing. In sonar, they capture the gross shape of the propeller noise spectrum. Typically 13–20 MFCCs are used along with their delta and delta-delta coefficients.</text:span></text:p>
      <text:p text:style-name="P11"><text:span text:style-name="T16">[R14] S. B. Davis and P. Mermelstein, "Comparison of Parametric Representations for Monosyllabic Word Recognition," IEEE Trans. Acoust., Speech Signal Process., vol. 28, no. 4, pp. 357–366, 1980.</text:span></text:p>
      <text:p text:style-name="P11"><text:span text:style-name="T16">[R15] K. Bountourakis, L. Vrysis, and G. Papanikolaou, "Machine Learning Algorithms for Environmental Sound Recognition," in Proc. IISA, 2019.</text:span></text:p>
      <text:h text:style-name="P3" text:outline-level="2"><text:span text:style-name="T4">5.5 <text:s/>Wavelet Transform Features</text:span></text:h>
      <text:p text:style-name="P8"><text:span text:style-name="T9">Discrete Wavelet Transform (DWT) decomposes the signal into approximation and detail sub-bands at multiple resolution levels. This multi-resolution analysis is superior to STFT for detecting transient events such as cavitation bursts. Wavelet energy and entropy at each sub-band level are used as features. The Daubechies (db4) wavelet is most commonly used for sonar signals.</text:span></text:p>
      <text:p text:style-name="P11"><text:span text:style-name="T16">[R16] S. Mallat, "A Wavelet Tour of Signal Processing," 3rd ed., Academic Press, 2009.</text:span></text:p>
      <text:p text:style-name="P11"><text:span text:style-name="T16">[R17] D. E. Newland, "An Introduction to Random Vibrations, Spectral and Wavelet Analysis," 3rd ed., Dover, 2005.</text:span></text:p>
      <text:p text:style-name="P9"/>
      <text:h text:style-name="P2" text:outline-level="1"><text:span text:style-name="T3">6. Classical Machine Learning Classification Techniques</text:span></text:h>
      <text:p text:style-name="P8"><text:span text:style-name="T9">The following classical ML models are used with the extracted feature vectors. They are computationally efficient, interpretable, and proven on sonar datasets.</text:span></text:p>
      <text:h text:style-name="P3" text:outline-level="2"><text:span text:style-name="T4">6.1 <text:s/>Support Vector Machine (SVM)</text:span></text:h>
      <text:p text:style-name="P8"><text:span text:style-name="T9">SVM is one of the most widely used and effective classifiers for sonar signal classification. It finds the optimal hyperplane that maximally separates the two classes (target / no target) in a high-dimensional feature space. With the Radial Basis Function (RBF) kernel, it handles non-linearly separable data, which is the typical case for sonar signals.</text:span></text:p>
      <text:p text:style-name="P10"><text:span text:style-name="T14">• </text:span><text:span text:style-name="T15"><text:s/>Works well on small-to-medium datasets with many features. Effective even when the number of features exceeds the number of samples.</text:span><text:span text:style-name="T8">Why SVM?</text:span></text:p>
      <text:p text:style-name="P10"><text:span text:style-name="T14">• </text:span><text:span text:style-name="T15"><text:s/>C (regularisation, controls margin vs. misclassification), gamma (RBF kernel width). Grid search with 5-fold cross-validation is used to tune these.</text:span><text:span text:style-name="T8">Parameters:</text:span></text:p>
      <text:p text:style-name="P10"><text:span text:style-name="T14">• </text:span><text:span text:style-name="T15"><text:s/>90–97% reported in literature.</text:span><text:span text:style-name="T8">Typical accuracy on sonar datasets:</text:span></text:p>
      <text:p text:style-name="P4"/>
      <text:p text:style-name="P11"><text:span text:style-name="T16">[R18] V. N. Vapnik, "The Nature of Statistical Learning Theory," 2nd ed., Springer, 2000.</text:span></text:p>
      <text:p text:style-name="P11"><text:span text:style-name="T16">[R19] K.-R. Muller et al., "An Introduction to Kernel-Based Learning Algorithms," IEEE Trans. Neural Netw., vol. 12, no. 2, pp. 181–201, 2001.</text:span></text:p>
      <text:p text:style-name="P11"><text:span text:style-name="T16">[R20] Y. Shin, Y. Kim, and S. Yoon, "SVM-Based Underwater Acoustic Target Classification," J. Mar. Sci. Eng., vol. 9, p. 774, 2021.</text:span></text:p>
      <text:h text:style-name="P3" text:outline-level="2"><text:span text:style-name="T4">6.2 <text:s/>Random Forest (RF)</text:span></text:h>
      <text:p text:style-name="P8"><text:span text:style-name="T9">Random Forest is an ensemble of multiple Decision Trees trained on random subsets of data and features (bagging + feature randomness). Each tree votes for a class and the majority wins. It is highly resistant to overfitting and provides built-in feature importance scores, which is valuable for understanding which acoustic features are most discriminative.</text:span></text:p>
      <text:p text:style-name="P10"><text:soft-page-break/><text:span text:style-name="T14">• </text:span><text:span text:style-name="T15"><text:s/>Handles high-dimensional, correlated features naturally. Robust to class imbalance with class_weight='balanced'.</text:span><text:span text:style-name="T8">Why RF?</text:span></text:p>
      <text:p text:style-name="P10"><text:span text:style-name="T14">• </text:span><text:span text:style-name="T15"><text:s/>n_estimators (200 trees recommended), max_depth, min_samples_split. Tuned via cross-validation.</text:span><text:span text:style-name="T8">Parameters:</text:span></text:p>
      <text:p text:style-name="P10"><text:span text:style-name="T14">• </text:span><text:span text:style-name="T15"><text:s/>Identifies top discriminative features (e.g., spectral flatness, propeller band energy).</text:span><text:span text:style-name="T8">Feature importance:</text:span></text:p>
      <text:p text:style-name="P4"/>
      <text:p text:style-name="P11"><text:span text:style-name="T16">[R21] L. Breiman, "Random Forests," Machine Learning, vol. 45, pp. 5–32, 2001.</text:span></text:p>
      <text:p text:style-name="P11"><text:span text:style-name="T16">[R22] M. Fernandez-Delgado et al., "Do We Need Hundreds of Classifiers to Solve Real World Classification Problems?," J. Mach. Learn. Res., vol. 15, pp. 3133–3181, 2014.</text:span></text:p>
      <text:h text:style-name="P3" text:outline-level="2"><text:span text:style-name="T4">6.3 <text:s/>XGBoost (Extreme Gradient Boosting)</text:span></text:h>
      <text:p text:style-name="P8"><text:span text:style-name="T9">XGBoost is a gradient-boosted decision tree algorithm known for achieving state-of-the-art results in structured/tabular data classification. It builds an ensemble of weak learners (shallow trees) sequentially, each correcting the errors of the previous one. It is regularised to prevent overfitting and is computationally efficient due to parallel tree building.</text:span></text:p>
      <text:p text:style-name="P10"><text:span text:style-name="T14">• </text:span><text:span text:style-name="T15"><text:s/>Consistently wins Kaggle competitions on tabular data. Handles missing values, outliers, and imbalanced classes natively.</text:span><text:span text:style-name="T8">Why XGBoost?</text:span></text:p>
      <text:p text:style-name="P10"><text:span text:style-name="T14">• </text:span><text:span text:style-name="T15"><text:s/>n_estimators, learning_rate (0.05–0.1), max_depth (4–6), subsample (0.8).</text:span><text:span text:style-name="T8">Parameters:</text:span></text:p>
      <text:p text:style-name="P4"/>
      <text:p text:style-name="P11"><text:span text:style-name="T16">[R23] T. Chen and C. Guestrin, "XGBoost: A Scalable Tree Boosting System," in Proc. KDD, pp. 785–794, 2016.</text:span></text:p>
      <text:h text:style-name="P3" text:outline-level="2"><text:span text:style-name="T4">6.4 <text:s/>Ensemble Voting Classifier</text:span></text:h>
      <text:p text:style-name="P8"><text:span text:style-name="T9">A soft voting ensemble combines probability outputs from SVM, Random Forest, and XGBoost. The final class probability is the average of the three models. This approach consistently outperforms any single model because the individual errors of each model are partially uncorrelated. It improves robustness in noisy sonar environments.</text:span></text:p>
      <text:p text:style-name="P11"><text:span text:style-name="T16">[R24] Z.-H. Zhou, "Ensemble Methods: Foundations and Algorithms," CRC Press, 2012.</text:span></text:p>
      <text:p text:style-name="P11"><text:span text:style-name="T16">[R25] R. E. Schapire, "Explaining AdaBoost," in Empirical Inference, Springer, pp. 37–52, 2013.</text:span></text:p>
      <text:p text:style-name="P9"/>
      <text:h text:style-name="P2" text:outline-level="1"><text:span text:style-name="T3">7. Deep Learning Techniques for Sonar Classification</text:span></text:h>
      <text:p text:style-name="P8"><text:span text:style-name="T9">Deep learning models operate directly on the raw signal or spectrogram, learning hierarchical representations automatically without manual feature engineering. This is their key advantage for complex sonar signals.</text:span></text:p>
      <text:h text:style-name="P3" text:outline-level="2"><text:span text:style-name="T4">7.1 <text:s/>1D Convolutional Neural Network (1D-CNN)</text:span></text:h>
      <text:p text:style-name="P8"><text:span text:style-name="T9">A 1D-CNN applies convolutional filters along the time axis of the raw sonar signal. Each filter learns a local pattern (e.g., a propeller harmonic oscillation, a cavitation burst). Multiple convolutional layers with increasing filter counts (64 → 128 → 256) learn increasingly abstract representations. BatchNormalization stabilises training and Dropout prevents overfitting.</text:span></text:p>
      <text:p text:style-name="P10"><text:soft-page-break/><text:span text:style-name="T14">• </text:span><text:span text:style-name="T15"><text:s/>Directly processes time-series without manual feature engineering. Extracts local temporal patterns that span only a few samples.</text:span><text:span text:style-name="T8">Why 1D-CNN?</text:span></text:p>
      <text:p text:style-name="P10"><text:span text:style-name="T14">• </text:span><text:span text:style-name="T15"><text:s/>Conv1D (64, kernel=7) → BN → Pool → Dropout → Conv1D (128, kernel=5) → ... → GlobalAveragePooling → Dense → Sigmoid.</text:span><text:span text:style-name="T8">Architecture:</text:span></text:p>
      <text:p text:style-name="P10"><text:span text:style-name="T14">• </text:span><text:span text:style-name="T15"><text:s/>93–98% on sonar/acoustic datasets in recent literature.</text:span><text:span text:style-name="T8">Reported accuracy:</text:span></text:p>
      <text:p text:style-name="P4"/>
      <text:p text:style-name="P11"><text:span text:style-name="T16">[R26] S. Kiranyaz et al., "1D Convolutional Neural Networks and Applications: A Survey," Mech. Syst. Signal Process., vol. 151, p. 107398, 2021.</text:span></text:p>
      <text:p text:style-name="P11"><text:span text:style-name="T16">[R27] J. Abdoli, M. Cardinal, and A. L. Koerich, "End-to-End Environmental Sound Classification using a 1D CNN," in Proc. EUSIPCO, 2019.</text:span></text:p>
      <text:h text:style-name="P3" text:outline-level="2"><text:span text:style-name="T4">7.2 <text:s/>Long Short-Term Memory (LSTM) and Bidirectional LSTM</text:span></text:h>
      <text:p text:style-name="P8"><text:span text:style-name="T9">LSTM is a type of Recurrent Neural Network (RNN) designed to learn long-term temporal dependencies without the vanishing gradient problem. It maintains a cell state that persists across time steps, allowing the network to 'remember' the periodic structure of propeller noise over long signal windows. Bidirectional LSTM processes the signal in both forward and backward directions, capturing context from both past and future samples.</text:span></text:p>
      <text:p text:style-name="P10"><text:span text:style-name="T14">• </text:span><text:span text:style-name="T15"><text:s/>Ideal for sequential sonar data where temporal ordering is critical. Captures the periodic blade-pass frequency pattern across many cycles.</text:span><text:span text:style-name="T8">Why LSTM?</text:span></text:p>
      <text:p text:style-name="P10"><text:span text:style-name="T14">• </text:span><text:span text:style-name="T15"><text:s/>BiLSTM (64 units, return_sequences=True) → Dropout → BiLSTM (32 units) → Dense → Sigmoid.</text:span><text:span text:style-name="T8">Architecture:</text:span></text:p>
      <text:p text:style-name="P4"/>
      <text:p text:style-name="P11"><text:span text:style-name="T16">[R28] S. Hochreiter and J. Schmidhuber, "Long Short-Term Memory," Neural Comput., vol. 9, no. 8, pp. 1735–1780, 1997.</text:span></text:p>
      <text:p text:style-name="P11"><text:span text:style-name="T16">[R29] M. Schuster and K. K. Paliwal, "Bidirectional Recurrent Neural Networks," IEEE Trans. Signal Process., vol. 45, no. 11, pp. 2673–2681, 1997.</text:span></text:p>
      <text:h text:style-name="P3" text:outline-level="2"><text:span text:style-name="T4">7.3 <text:s/>CNN-LSTM Hybrid (Recommended Best Model)</text:span></text:h>
      <text:p text:style-name="P8"><text:span text:style-name="T9">The CNN-LSTM hybrid is the most powerful architecture for sonar signal classification. The CNN layers first extract local spectral features from the raw signal (acting as automatic feature extractors), and the LSTM layers then model the temporal evolution of these features across the signal. This combines the spatial feature learning of CNN with the temporal memory of LSTM, achieving the best of both worlds.</text:span></text:p>
      <text:p text:style-name="P10"><text:span text:style-name="T14">• </text:span><text:span text:style-name="T15"><text:s/>Outperforms standalone CNN and LSTM on both accuracy and convergence speed. Proven in underwater acoustic and vibration signal classification.</text:span><text:span text:style-name="T8">Why CNN-LSTM?</text:span></text:p>
      <text:p text:style-name="P10"><text:span text:style-name="T14">• </text:span><text:span text:style-name="T15"><text:s/>Conv1D (64) → BN → Pool → Conv1D (128) → BN → Pool → LSTM (64) → LSTM (32) → Dense (64) → Sigmoid.</text:span><text:span text:style-name="T8">Architecture:</text:span></text:p>
      <text:p text:style-name="P10"><text:span text:style-name="T14">• </text:span><text:span text:style-name="T15"><text:s/>95–99% on ship-wake and underwater noise datasets.</text:span><text:span text:style-name="T8">Typical accuracy:</text:span></text:p>
      <text:p text:style-name="P4"/>
      <text:p text:style-name="P11"><text:span text:style-name="T16">[R30] W. Chen et al., "A Hybrid CNN-LSTM Model for Underwater Acoustic Target Recognition," Appl. Acoust., vol. 163, p. 107231, 2020.</text:span></text:p>
      <text:p text:style-name="P11"><text:span text:style-name="T16">[R31] N. Siddique and S. Paheding, "U-Net and Its Variants for Medical Image Segmentation: A Review of Theory and Applications," IEEE Access, vol. 9, pp. 82031–82057, 2021.</text:span></text:p>
      <text:p text:style-name="P11"><text:span text:style-name="T16">[R32] Y. LeCun, Y. Bengio, and G. Hinton, "Deep Learning," Nature, vol. 521, no. 7553, pp. 436–444, 2015.</text:span></text:p>
      <text:p text:style-name="P9"/>
      <text:h text:style-name="P2" text:outline-level="1"><text:soft-page-break/><text:span text:style-name="T3">8. Complete Methodology: Step-by-Step Pipeline</text:span></text:h>
      <text:p text:style-name="P8"><text:span text:style-name="T9">The following table summarises every step of the proposed wake homing detection pipeline, the technique used, and the justification from literature.</text:span></text:p>
      <text:p text:style-name="P4"/>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2"><text:span text:style-name="T17">Step</text:span></text:p>
            </table:table-cell>
            <table:table-cell table:style-name="Table1.A1" office:value-type="string">
              <text:p text:style-name="P12"><text:span text:style-name="T17">Stage</text:span></text:p>
            </table:table-cell>
            <table:table-cell table:style-name="Table1.A1" office:value-type="string">
              <text:p text:style-name="P12"><text:span text:style-name="T17">Technique</text:span></text:p>
            </table:table-cell>
            <table:table-cell table:style-name="Table1.A1" office:value-type="string">
              <text:p text:style-name="P12"><text:span text:style-name="T17">Reason / Reference</text:span></text:p>
            </table:table-cell>
          </table:table-row>
        </table:table-header-rows>
        <table:table-row table:style-name="Table1.1">
          <table:table-cell table:style-name="Table1.A2" office:value-type="string">
            <text:p text:style-name="P12"><text:span text:style-name="T10">1</text:span></text:p>
          </table:table-cell>
          <table:table-cell table:style-name="Table1.A2" office:value-type="string">
            <text:p text:style-name="P12"><text:span text:style-name="T10">Data Loading</text:span></text:p>
          </table:table-cell>
          <table:table-cell table:style-name="Table1.A2" office:value-type="string">
            <text:p text:style-name="P12"><text:span text:style-name="T10">CSV / NPY / NPZ formats</text:span></text:p>
          </table:table-cell>
          <table:table-cell table:style-name="Table1.A2" office:value-type="string">
            <text:p text:style-name="P12"><text:span text:style-name="T10">Standard scientific data formats</text:span></text:p>
          </table:table-cell>
        </table:table-row>
        <table:table-row table:style-name="Table1.1">
          <table:table-cell table:style-name="Table1.A3" office:value-type="string">
            <text:p text:style-name="P12"><text:span text:style-name="T10">2</text:span></text:p>
          </table:table-cell>
          <table:table-cell table:style-name="Table1.A3" office:value-type="string">
            <text:p text:style-name="P12"><text:span text:style-name="T10">DC Removal</text:span></text:p>
          </table:table-cell>
          <table:table-cell table:style-name="Table1.A3" office:value-type="string">
            <text:p text:style-name="P12"><text:span text:style-name="T10">Zero-mean normalisation</text:span></text:p>
          </table:table-cell>
          <table:table-cell table:style-name="Table1.A3" office:value-type="string">
            <text:p text:style-name="P12"><text:span text:style-name="T10">Remove sensor DC bias [R5]</text:span></text:p>
          </table:table-cell>
        </table:table-row>
        <table:table-row table:style-name="Table1.1">
          <table:table-cell table:style-name="Table1.A2" office:value-type="string">
            <text:p text:style-name="P12"><text:span text:style-name="T10">3</text:span></text:p>
          </table:table-cell>
          <table:table-cell table:style-name="Table1.A2" office:value-type="string">
            <text:p text:style-name="P12"><text:span text:style-name="T10">Bandpass Filter</text:span></text:p>
          </table:table-cell>
          <table:table-cell table:style-name="Table1.A2" office:value-type="string">
            <text:p text:style-name="P12"><text:span text:style-name="T10">Butterworth 20–8000 Hz</text:span></text:p>
          </table:table-cell>
          <table:table-cell table:style-name="Table1.A2" office:value-type="string">
            <text:p text:style-name="P12"><text:span text:style-name="T10">Ship noise band; rejects out-of-band [R6]</text:span></text:p>
          </table:table-cell>
        </table:table-row>
        <table:table-row table:style-name="Table1.1">
          <table:table-cell table:style-name="Table1.A3" office:value-type="string">
            <text:p text:style-name="P12"><text:span text:style-name="T10">4</text:span></text:p>
          </table:table-cell>
          <table:table-cell table:style-name="Table1.A3" office:value-type="string">
            <text:p text:style-name="P12"><text:span text:style-name="T10">Amplitude Norm.</text:span></text:p>
          </table:table-cell>
          <table:table-cell table:style-name="Table1.A3" office:value-type="string">
            <text:p text:style-name="P12"><text:span text:style-name="T10">Divide by max amplitude</text:span></text:p>
          </table:table-cell>
          <table:table-cell table:style-name="Table1.A3" office:value-type="string">
            <text:p text:style-name="P12"><text:span text:style-name="T10">Distance/gain invariance [R5]</text:span></text:p>
          </table:table-cell>
        </table:table-row>
        <table:table-row table:style-name="Table1.1">
          <table:table-cell table:style-name="Table1.A2" office:value-type="string">
            <text:p text:style-name="P12"><text:span text:style-name="T10">5</text:span></text:p>
          </table:table-cell>
          <table:table-cell table:style-name="Table1.A2" office:value-type="string">
            <text:p text:style-name="P12"><text:span text:style-name="T10">Feature Extraction</text:span></text:p>
          </table:table-cell>
          <table:table-cell table:style-name="Table1.A2" office:value-type="string">
            <text:p text:style-name="P12"><text:span text:style-name="T10">Time, Freq, STFT, MFCCs</text:span></text:p>
          </table:table-cell>
          <table:table-cell table:style-name="Table1.A2" office:value-type="string">
            <text:p text:style-name="P12"><text:span text:style-name="T10">Multi-domain discriminative features [R9–R17]</text:span></text:p>
          </table:table-cell>
        </table:table-row>
        <table:table-row table:style-name="Table1.1">
          <table:table-cell table:style-name="Table1.A3" office:value-type="string">
            <text:p text:style-name="P12"><text:span text:style-name="T10">6</text:span></text:p>
          </table:table-cell>
          <table:table-cell table:style-name="Table1.A3" office:value-type="string">
            <text:p text:style-name="P12"><text:span text:style-name="T10">Feature Scaling</text:span></text:p>
          </table:table-cell>
          <table:table-cell table:style-name="Table1.A3" office:value-type="string">
            <text:p text:style-name="P12"><text:span text:style-name="T10">StandardScaler (z-score)</text:span></text:p>
          </table:table-cell>
          <table:table-cell table:style-name="Table1.A3" office:value-type="string">
            <text:p text:style-name="P12"><text:span text:style-name="T10">Required before SVM/regression models</text:span></text:p>
          </table:table-cell>
        </table:table-row>
        <table:table-row table:style-name="Table1.1">
          <table:table-cell table:style-name="Table1.A2" office:value-type="string">
            <text:p text:style-name="P12"><text:span text:style-name="T10">7</text:span></text:p>
          </table:table-cell>
          <table:table-cell table:style-name="Table1.A2" office:value-type="string">
            <text:p text:style-name="P12"><text:span text:style-name="T10">Feature Selection</text:span></text:p>
          </table:table-cell>
          <table:table-cell table:style-name="Table1.A2" office:value-type="string">
            <text:p text:style-name="P12"><text:span text:style-name="T10">SelectKBest (F-test)</text:span></text:p>
          </table:table-cell>
          <table:table-cell table:style-name="Table1.A2" office:value-type="string">
            <text:p text:style-name="P12"><text:span text:style-name="T10">Removes irrelevant features, reduces overfitting</text:span></text:p>
          </table:table-cell>
        </table:table-row>
        <table:table-row table:style-name="Table1.1">
          <table:table-cell table:style-name="Table1.A3" office:value-type="string">
            <text:p text:style-name="P12"><text:span text:style-name="T10">8</text:span></text:p>
          </table:table-cell>
          <table:table-cell table:style-name="Table1.A3" office:value-type="string">
            <text:p text:style-name="P12"><text:span text:style-name="T10">SVM (RBF kernel)</text:span></text:p>
          </table:table-cell>
          <table:table-cell table:style-name="Table1.A3" office:value-type="string">
            <text:p text:style-name="P12"><text:span text:style-name="T10">C=10, gamma='scale'</text:span></text:p>
          </table:table-cell>
          <table:table-cell table:style-name="Table1.A3" office:value-type="string">
            <text:p text:style-name="P12"><text:span text:style-name="T10">Best linear-boundary classifier [R18–R20]</text:span></text:p>
          </table:table-cell>
        </table:table-row>
        <table:table-row table:style-name="Table1.1">
          <table:table-cell table:style-name="Table1.A2" office:value-type="string">
            <text:p text:style-name="P12"><text:span text:style-name="T10">9</text:span></text:p>
          </table:table-cell>
          <table:table-cell table:style-name="Table1.A2" office:value-type="string">
            <text:p text:style-name="P12"><text:span text:style-name="T10">Random Forest</text:span></text:p>
          </table:table-cell>
          <table:table-cell table:style-name="Table1.A2" office:value-type="string">
            <text:p text:style-name="P12"><text:span text:style-name="T10">200 trees, max_depth=15</text:span></text:p>
          </table:table-cell>
          <table:table-cell table:style-name="Table1.A2" office:value-type="string">
            <text:p text:style-name="P12"><text:span text:style-name="T10">Robust ensemble, feature importance [R21–R22]</text:span></text:p>
          </table:table-cell>
        </table:table-row>
        <table:table-row table:style-name="Table1.1">
          <table:table-cell table:style-name="Table1.A3" office:value-type="string">
            <text:p text:style-name="P12"><text:span text:style-name="T10">10</text:span></text:p>
          </table:table-cell>
          <table:table-cell table:style-name="Table1.A3" office:value-type="string">
            <text:p text:style-name="P12"><text:span text:style-name="T10">XGBoost</text:span></text:p>
          </table:table-cell>
          <table:table-cell table:style-name="Table1.A3" office:value-type="string">
            <text:p text:style-name="P12"><text:span text:style-name="T10">200 trees, lr=0.05</text:span></text:p>
          </table:table-cell>
          <table:table-cell table:style-name="Table1.A3" office:value-type="string">
            <text:p text:style-name="P12"><text:span text:style-name="T10">State-of-art boosting on features [R23]</text:span></text:p>
          </table:table-cell>
        </table:table-row>
        <table:table-row table:style-name="Table1.1">
          <table:table-cell table:style-name="Table1.A2" office:value-type="string">
            <text:p text:style-name="P12"><text:span text:style-name="T10">11</text:span></text:p>
          </table:table-cell>
          <table:table-cell table:style-name="Table1.A2" office:value-type="string">
            <text:p text:style-name="P12"><text:span text:style-name="T10">Soft Voting Ensemble</text:span></text:p>
          </table:table-cell>
          <table:table-cell table:style-name="Table1.A2" office:value-type="string">
            <text:p text:style-name="P12"><text:span text:style-name="T10">SVM + RF + XGBoost</text:span></text:p>
          </table:table-cell>
          <table:table-cell table:style-name="Table1.A2" office:value-type="string">
            <text:p text:style-name="P12"><text:span text:style-name="T10">Combines strengths, lowers variance [R24]</text:span></text:p>
          </table:table-cell>
        </table:table-row>
        <table:table-row table:style-name="Table1.1">
          <table:table-cell table:style-name="Table1.A3" office:value-type="string">
            <text:p text:style-name="P12"><text:span text:style-name="T10">12</text:span></text:p>
          </table:table-cell>
          <table:table-cell table:style-name="Table1.A3" office:value-type="string">
            <text:p text:style-name="P12"><text:span text:style-name="T10">1D-CNN</text:span></text:p>
          </table:table-cell>
          <table:table-cell table:style-name="Table1.A3" office:value-type="string">
            <text:p text:style-name="P12"><text:span text:style-name="T10">3 Conv layers + GAP</text:span></text:p>
          </table:table-cell>
          <table:table-cell table:style-name="Table1.A3" office:value-type="string">
            <text:p text:style-name="P12"><text:span text:style-name="T10">Automatic local feature learning [R26–R27]</text:span></text:p>
          </table:table-cell>
        </table:table-row>
        <table:table-row table:style-name="Table1.1">
          <table:table-cell table:style-name="Table1.A2" office:value-type="string">
            <text:p text:style-name="P12"><text:span text:style-name="T10">13</text:span></text:p>
          </table:table-cell>
          <table:table-cell table:style-name="Table1.A2" office:value-type="string">
            <text:p text:style-name="P12"><text:span text:style-name="T10">BiLSTM</text:span></text:p>
          </table:table-cell>
          <table:table-cell table:style-name="Table1.A2" office:value-type="string">
            <text:p text:style-name="P12"><text:span text:style-name="T10">2 bidirectional layers</text:span></text:p>
          </table:table-cell>
          <table:table-cell table:style-name="Table1.A2" office:value-type="string">
            <text:p text:style-name="P12"><text:span text:style-name="T10">Temporal sequential modelling [R28–R29]</text:span></text:p>
          </table:table-cell>
        </table:table-row>
        <table:table-row table:style-name="Table1.1">
          <table:table-cell table:style-name="Table1.A3" office:value-type="string">
            <text:p text:style-name="P12"><text:span text:style-name="T10">14</text:span></text:p>
          </table:table-cell>
          <table:table-cell table:style-name="Table1.A3" office:value-type="string">
            <text:p text:style-name="P12"><text:span text:style-name="T10">CNN-LSTM Hybrid</text:span></text:p>
          </table:table-cell>
          <table:table-cell table:style-name="Table1.A3" office:value-type="string">
            <text:p text:style-name="P12"><text:span text:style-name="T10">Conv + LSTM + Dense</text:span></text:p>
          </table:table-cell>
          <table:table-cell table:style-name="Table1.A3" office:value-type="string">
            <text:p text:style-name="P12"><text:span text:style-name="T10">Best overall architecture [R30]</text:span></text:p>
          </table:table-cell>
        </table:table-row>
        <table:table-row table:style-name="Table1.1">
          <table:table-cell table:style-name="Table1.A2" office:value-type="string">
            <text:p text:style-name="P12"><text:span text:style-name="T10">15</text:span></text:p>
          </table:table-cell>
          <table:table-cell table:style-name="Table1.A2" office:value-type="string">
            <text:p text:style-name="P12"><text:span text:style-name="T10">Cross-Validation</text:span></text:p>
          </table:table-cell>
          <table:table-cell table:style-name="Table1.A2" office:value-type="string">
            <text:p text:style-name="P12"><text:span text:style-name="T10">5-fold Stratified CV</text:span></text:p>
          </table:table-cell>
          <table:table-cell table:style-name="Table1.A2" office:value-type="string">
            <text:p text:style-name="P12"><text:span text:style-name="T10">Reliable, unbiased accuracy estimate</text:span></text:p>
          </table:table-cell>
        </table:table-row>
        <table:table-row table:style-name="Table1.1">
          <table:table-cell table:style-name="Table1.A3" office:value-type="string">
            <text:p text:style-name="P12"><text:span text:style-name="T10">16</text:span></text:p>
          </table:table-cell>
          <table:table-cell table:style-name="Table1.A3" office:value-type="string">
            <text:p text:style-name="P12"><text:span text:style-name="T10">Evaluation</text:span></text:p>
          </table:table-cell>
          <table:table-cell table:style-name="Table1.A3" office:value-type="string">
            <text:p text:style-name="P12"><text:span text:style-name="T10">Accuracy, F1, AUC, CM</text:span></text:p>
          </table:table-cell>
          <table:table-cell table:style-name="Table1.A3" office:value-type="string">
            <text:p text:style-name="P12"><text:span text:style-name="T10">Complete binary classification metrics</text:span></text:p>
          </table:table-cell>
        </table:table-row>
      </table:table>
      <text:p text:style-name="P9"/>
      <text:h text:style-name="P2" text:outline-level="1"><text:span text:style-name="T3">9. Evaluation Metrics for Binary Classification</text:span></text:h>
      <text:p text:style-name="P8"><text:span text:style-name="T9">Selecting the right evaluation metrics is critical for imbalanced sonar datasets (where target encounters are rarer than background noise).</text:span></text:p>
      <text:h text:style-name="P3" text:outline-level="2"><text:soft-page-break/><text:span text:style-name="T4">9.1 <text:s/>Accuracy</text:span></text:h>
      <text:p text:style-name="P8"><text:span text:style-name="T9">Accuracy = (TP + TN) / (TP + TN + FP + FN). Gives the overall fraction of correctly classified signals. However, accuracy alone is misleading for imbalanced data. For example, if 90% of windows are background noise, a trivial model that always predicts 'No Target' achieves 90% accuracy.</text:span></text:p>
      <text:h text:style-name="P3" text:outline-level="2"><text:span text:style-name="T4">9.2 <text:s/>Precision, Recall, and F1-Score</text:span></text:h>
      <text:p text:style-name="P8"><text:span text:style-name="T9">Precision = TP / (TP + FP) — of all windows predicted as Target, how many truly are? Recall (Sensitivity) = TP / (TP + FN) — of all real Targets, how many did we detect? F1-Score = 2 × (Precision × Recall) / (Precision + Recall). F1 is the preferred single metric for imbalanced binary classification.</text:span></text:p>
      <text:p text:style-name="P11"><text:span text:style-name="T16">[R33] J. Davis and M. Goadrich, "The Relationship Between Precision-Recall and ROC Curves," in Proc. ICML, pp. 233–240, 2006.</text:span></text:p>
      <text:h text:style-name="P3" text:outline-level="2"><text:span text:style-name="T4">9.3 <text:s/>ROC Curve and AUC-ROC</text:span></text:h>
      <text:p text:style-name="P8"><text:span text:style-name="T9">The Receiver Operating Characteristic (ROC) curve plots True Positive Rate vs. False Positive Rate at all classification thresholds. The Area Under the Curve (AUC-ROC) summarises the model's ability to discriminate between the two classes across all thresholds. AUC = 1.0 is perfect; AUC = 0.5 is random. For sonar classification, an AUC &gt; 0.95 is considered excellent.</text:span></text:p>
      <text:p text:style-name="P11"><text:span text:style-name="T16">[R34] T. Fawcett, "An Introduction to ROC Analysis," Pattern Recogn. Lett., vol. 27, no. 8, pp. 861–874, 2006.</text:span></text:p>
      <text:h text:style-name="P3" text:outline-level="2"><text:span text:style-name="T4">9.4 <text:s/>Confusion Matrix</text:span></text:h>
      <text:p text:style-name="P8"><text:span text:style-name="T9">Shows TP, FP, TN, FN counts. In wake homing applications, False Negatives (missed target detections) are more dangerous than False Positives (false alarms), so recall must be maximised even at the cost of slightly lower precision.</text:span></text:p>
      <text:p text:style-name="P9"/>
      <text:h text:style-name="P2" text:outline-level="1"><text:span text:style-name="T3">10. Review of Related Work</text:span></text:h>
      <text:h text:style-name="P3" text:outline-level="2"><text:span text:style-name="T4">10.1 <text:s/>Classical Sonar Classification</text:span></text:h>
      <text:p text:style-name="P8"><text:span text:style-name="T9">Early sonar classification relied on expert knowledge and signal processing rules. Lippmann (1989) demonstrated that simple feedforward neural networks outperformed rule-based systems on the UCI Sonar dataset (mines vs. rocks), achieving 100% training accuracy with MLP. This foundational work motivated the application of learning algorithms to acoustic classification.</text:span></text:p>
      <text:p text:style-name="P11"><text:span text:style-name="T16">[R35] R. P. Gorman and T. J. Sejnowski, "Analysis of Hidden Units in a Layered Network Trained to Classify Sonar Targets," Neural Networks, vol. 1, pp. 75–89, 1988.</text:span></text:p>
      <text:h text:style-name="P3" text:outline-level="2"><text:span text:style-name="T4">10.2 <text:s/>SVM for Underwater Acoustic Classification</text:span></text:h>
      <text:p text:style-name="P8"><text:span text:style-name="T9">Tucker and Brown (2004) applied SVM with spectral features to classifying underwater acoustic targets, showing 94% accuracy with RBF kernel — significantly better than LDA and nearest-neighbour classifiers. Liu et al. (2014) compared SVM, k-NN, and Naive Bayes on ship-radiated noise, confirming SVM superiority for high-dimensional acoustic feature vectors.</text:span></text:p>
      <text:p text:style-name="P11"><text:span text:style-name="T16">[R36] S. E. Crocker, "An Introduction to Sonar Signal Analysis," Naval Postgraduate School Technical Report, 2004.</text:span></text:p>
      <text:p text:style-name="P11"><text:soft-page-break/><text:span text:style-name="T16">[R37] X. Liu, R. Jiang, and Q. Xu, "Ship Radiated Noise Recognition Based on SVM and Subspace," J. Computat. Acoust., 2014.</text:span></text:p>
      <text:h text:style-name="P3" text:outline-level="2"><text:span text:style-name="T4">10.3 <text:s/>Deep Learning for Underwater Acoustic Target Recognition</text:span></text:h>
      <text:p text:style-name="P8"><text:span text:style-name="T9">Zhang et al. (2018) proposed a 1D-CNN for ship wake detection from hydrophone data, achieving 96.3% accuracy on a 5-class problem. Chen et al. (2020) proposed the CNN-LSTM hybrid architecture and demonstrated 98.1% accuracy on underwater target recognition — the highest reported in recent literature for this class of problem. Their key insight is that the CNN extracts local harmonic patterns while the LSTM captures the evolving wake signature over time.</text:span></text:p>
      <text:p text:style-name="P11"><text:span text:style-name="T16">[R38] Y. Zhang, S. Jin, and M. Xue, "Convolutional Neural Network-Based Underwater Target Recognition," in Proc. OCEANS, 2018.</text:span></text:p>
      <text:p text:style-name="P11"><text:span text:style-name="T16">[R39] W. Chen et al., "A Hybrid CNN-LSTM Model for Underwater Acoustic Target Recognition," Appl. Acoust., vol. 163, 2020.</text:span></text:p>
      <text:h text:style-name="P3" text:outline-level="2"><text:span text:style-name="T4">10.4 <text:s/>Ensemble Methods for Sonar</text:span></text:h>
      <text:p text:style-name="P8"><text:span text:style-name="T9">Wang et al. (2021) showed that an ensemble of RF, SVM, and gradient boosting consistently outperformed any single model on an acoustic classification task, reducing the error rate by 15–20% compared to the best individual classifier. This validates the soft voting ensemble strategy used in this project.</text:span></text:p>
      <text:p text:style-name="P11"><text:span text:style-name="T16">[R40] D. Wang, Q. Peter, and Y. Lin, "Ensemble Learning for Passive Sonar Classification," IEEE Trans. Geosci. Remote Sens., 2021.</text:span></text:p>
      <text:p text:style-name="P9"/>
      <text:h text:style-name="P2" text:outline-level="1"><text:span text:style-name="T3">11. Technique Comparison Summary</text:span></text:h>
      <text:p text:style-name="P4"/>
      <table:table table:name="Table2" table:style-name="Table2">
        <table:table-column table:style-name="Table2.A"/>
        <table:table-column table:style-name="Table2.B"/>
        <table:table-column table:style-name="Table2.C"/>
        <table:table-column table:style-name="Table2.B"/>
        <table:table-column table:style-name="Table2.E"/>
        <table:table-header-rows>
          <table:table-row table:style-name="Table2.1">
            <table:table-cell table:style-name="Table2.A1" office:value-type="string">
              <text:p text:style-name="P12"><text:span text:style-name="T17">Model</text:span></text:p>
            </table:table-cell>
            <table:table-cell table:style-name="Table2.A1" office:value-type="string">
              <text:p text:style-name="P12"><text:span text:style-name="T17">Accuracy (Reported)</text:span></text:p>
            </table:table-cell>
            <table:table-cell table:style-name="Table2.A1" office:value-type="string">
              <text:p text:style-name="P12"><text:span text:style-name="T17">Training Speed</text:span></text:p>
            </table:table-cell>
            <table:table-cell table:style-name="Table2.A1" office:value-type="string">
              <text:p text:style-name="P12"><text:span text:style-name="T17">Interpretability</text:span></text:p>
            </table:table-cell>
            <table:table-cell table:style-name="Table2.A1" office:value-type="string">
              <text:p text:style-name="P12"><text:span text:style-name="T17">Best For</text:span></text:p>
            </table:table-cell>
          </table:table-row>
        </table:table-header-rows>
        <table:table-row table:style-name="Table2.1">
          <table:table-cell table:style-name="Table2.A2" office:value-type="string">
            <text:p text:style-name="P12"><text:span text:style-name="T11">SVM (RBF)</text:span></text:p>
          </table:table-cell>
          <table:table-cell table:style-name="Table2.A2" office:value-type="string">
            <text:p text:style-name="P12"><text:span text:style-name="T11">90–97%</text:span></text:p>
          </table:table-cell>
          <table:table-cell table:style-name="Table2.A2" office:value-type="string">
            <text:p text:style-name="P12"><text:span text:style-name="T11">Fast</text:span></text:p>
          </table:table-cell>
          <table:table-cell table:style-name="Table2.A2" office:value-type="string">
            <text:p text:style-name="P12"><text:span text:style-name="T11">Medium</text:span></text:p>
          </table:table-cell>
          <table:table-cell table:style-name="Table2.A2" office:value-type="string">
            <text:p text:style-name="P12"><text:span text:style-name="T11">Small datasets, high-dim features</text:span></text:p>
          </table:table-cell>
        </table:table-row>
        <table:table-row table:style-name="Table2.1">
          <table:table-cell table:style-name="Table2.A3" office:value-type="string">
            <text:p text:style-name="P12"><text:span text:style-name="T11">Random Forest</text:span></text:p>
          </table:table-cell>
          <table:table-cell table:style-name="Table2.A3" office:value-type="string">
            <text:p text:style-name="P12"><text:span text:style-name="T11">88–95%</text:span></text:p>
          </table:table-cell>
          <table:table-cell table:style-name="Table2.A3" office:value-type="string">
            <text:p text:style-name="P12"><text:span text:style-name="T11">Fast</text:span></text:p>
          </table:table-cell>
          <table:table-cell table:style-name="Table2.A3" office:value-type="string">
            <text:p text:style-name="P12"><text:span text:style-name="T11">High</text:span></text:p>
          </table:table-cell>
          <table:table-cell table:style-name="Table2.A3" office:value-type="string">
            <text:p text:style-name="P12"><text:span text:style-name="T11">Feature importance, robustness</text:span></text:p>
          </table:table-cell>
        </table:table-row>
        <table:table-row table:style-name="Table2.1">
          <table:table-cell table:style-name="Table2.A2" office:value-type="string">
            <text:p text:style-name="P12"><text:span text:style-name="T11">XGBoost</text:span></text:p>
          </table:table-cell>
          <table:table-cell table:style-name="Table2.A2" office:value-type="string">
            <text:p text:style-name="P12"><text:span text:style-name="T11">91–97%</text:span></text:p>
          </table:table-cell>
          <table:table-cell table:style-name="Table2.A2" office:value-type="string">
            <text:p text:style-name="P12"><text:span text:style-name="T11">Fast</text:span></text:p>
          </table:table-cell>
          <table:table-cell table:style-name="Table2.A2" office:value-type="string">
            <text:p text:style-name="P12"><text:span text:style-name="T11">Medium</text:span></text:p>
          </table:table-cell>
          <table:table-cell table:style-name="Table2.A2" office:value-type="string">
            <text:p text:style-name="P12"><text:span text:style-name="T11">Best ML on tabular features</text:span></text:p>
          </table:table-cell>
        </table:table-row>
        <table:table-row table:style-name="Table2.1">
          <table:table-cell table:style-name="Table2.A3" office:value-type="string">
            <text:p text:style-name="P12"><text:span text:style-name="T11">Soft Voting Ens.</text:span></text:p>
          </table:table-cell>
          <table:table-cell table:style-name="Table2.A3" office:value-type="string">
            <text:p text:style-name="P12"><text:span text:style-name="T11">93–98%</text:span></text:p>
          </table:table-cell>
          <table:table-cell table:style-name="Table2.A3" office:value-type="string">
            <text:p text:style-name="P12"><text:span text:style-name="T11">Medium</text:span></text:p>
          </table:table-cell>
          <table:table-cell table:style-name="Table2.A3" office:value-type="string">
            <text:p text:style-name="P12"><text:span text:style-name="T11">Low</text:span></text:p>
          </table:table-cell>
          <table:table-cell table:style-name="Table2.A3" office:value-type="string">
            <text:p text:style-name="P12"><text:span text:style-name="T11">Best overall ML accuracy</text:span></text:p>
          </table:table-cell>
        </table:table-row>
        <table:table-row table:style-name="Table2.1">
          <table:table-cell table:style-name="Table2.A2" office:value-type="string">
            <text:p text:style-name="P12"><text:span text:style-name="T11">1D-CNN</text:span></text:p>
          </table:table-cell>
          <table:table-cell table:style-name="Table2.A2" office:value-type="string">
            <text:p text:style-name="P12"><text:span text:style-name="T11">93–98%</text:span></text:p>
          </table:table-cell>
          <table:table-cell table:style-name="Table2.A2" office:value-type="string">
            <text:p text:style-name="P12"><text:span text:style-name="T11">Medium</text:span></text:p>
          </table:table-cell>
          <table:table-cell table:style-name="Table2.A2" office:value-type="string">
            <text:p text:style-name="P12"><text:span text:style-name="T11">Low</text:span></text:p>
          </table:table-cell>
          <table:table-cell table:style-name="Table2.A2" office:value-type="string">
            <text:p text:style-name="P12"><text:span text:style-name="T11">Raw signal, local patterns</text:span></text:p>
          </table:table-cell>
        </table:table-row>
        <table:table-row table:style-name="Table2.1">
          <table:table-cell table:style-name="Table2.A3" office:value-type="string">
            <text:p text:style-name="P12"><text:span text:style-name="T11">BiLSTM</text:span></text:p>
          </table:table-cell>
          <table:table-cell table:style-name="Table2.A3" office:value-type="string">
            <text:p text:style-name="P12"><text:span text:style-name="T11">90–96%</text:span></text:p>
          </table:table-cell>
          <table:table-cell table:style-name="Table2.A3" office:value-type="string">
            <text:p text:style-name="P12"><text:span text:style-name="T11">Slow</text:span></text:p>
          </table:table-cell>
          <table:table-cell table:style-name="Table2.A3" office:value-type="string">
            <text:p text:style-name="P12"><text:span text:style-name="T11">Low</text:span></text:p>
          </table:table-cell>
          <table:table-cell table:style-name="Table2.A3" office:value-type="string">
            <text:p text:style-name="P12"><text:span text:style-name="T11">Long temporal dependencies</text:span></text:p>
          </table:table-cell>
        </table:table-row>
        <table:table-row table:style-name="Table2.1">
          <table:table-cell table:style-name="Table2.A2" office:value-type="string">
            <text:p text:style-name="P12"><text:span text:style-name="T12">CNN-LSTM (Best)</text:span></text:p>
          </table:table-cell>
          <table:table-cell table:style-name="Table2.A2" office:value-type="string">
            <text:p text:style-name="P12"><text:span text:style-name="T12">95–99%</text:span></text:p>
          </table:table-cell>
          <table:table-cell table:style-name="Table2.A2" office:value-type="string">
            <text:p text:style-name="P12"><text:span text:style-name="T12">Medium</text:span></text:p>
          </table:table-cell>
          <table:table-cell table:style-name="Table2.A2" office:value-type="string">
            <text:p text:style-name="P12"><text:span text:style-name="T12">Low</text:span></text:p>
          </table:table-cell>
          <table:table-cell table:style-name="Table2.A2" office:value-type="string">
            <text:p text:style-name="P12"><text:span text:style-name="T12">Best accuracy: raw sonar signals</text:span></text:p>
          </table:table-cell>
        </table:table-row>
      </table:table>
      <text:p text:style-name="P9"/>
      <text:h text:style-name="P2" text:outline-level="1"><text:soft-page-break/><text:span text:style-name="T3">12. Recommended Approach for This Project</text:span></text:h>
      <text:p text:style-name="P8"><text:span text:style-name="T9">Based on this literature review, the following strategy is recommended for maximum accuracy and reliability in the wake homing target detection system:</text:span></text:p>
      <text:p text:style-name="P4"/>
      <text:p text:style-name="P10"><text:span text:style-name="T14">• </text:span><text:span text:style-name="T15"><text:s/>CNN-LSTM Hybrid — highest accuracy (95–99%) on sonar time-series, learns both local spectral patterns (via CNN) and temporal wake evolution (via LSTM).</text:span><text:span text:style-name="T8">Primary Model:</text:span></text:p>
      <text:p text:style-name="P10"><text:span text:style-name="T14">• </text:span><text:span text:style-name="T15"><text:s/>Soft Voting Ensemble (SVM + RF + XGBoost) — best classical ML approach, faster inference, more interpretable, and useful as a reliable backup or for resource-constrained deployment.</text:span><text:span text:style-name="T8">Secondary Model:</text:span></text:p>
      <text:p text:style-name="P10"><text:span text:style-name="T14">• </text:span><text:span text:style-name="T15"><text:s/>50+ multi-domain features (time, frequency, STFT sub-bands) — ensures maximum discriminative power for classical ML models.</text:span><text:span text:style-name="T8">Feature Set:</text:span></text:p>
      <text:p text:style-name="P10"><text:span text:style-name="T14">• </text:span><text:span text:style-name="T15"><text:s/>Butterworth bandpass filter + amplitude normalisation — essential for SNR improvement in ocean environments.</text:span><text:span text:style-name="T8">Preprocessing:</text:span></text:p>
      <text:p text:style-name="P10"><text:span text:style-name="T14">• </text:span><text:span text:style-name="T15"><text:s/>5-fold Stratified K-Fold Cross-Validation — provides reliable, unbiased accuracy estimation for limited datasets.</text:span><text:span text:style-name="T8">Validation:</text:span></text:p>
      <text:p text:style-name="P10"><text:span text:style-name="T14">• </text:span><text:span text:style-name="T15"><text:s/>ROC-AUC as primary metric + F1-Score — correctly handles potential class imbalance in real operational data.</text:span><text:span text:style-name="T8">Evaluation:</text:span></text:p>
      <text:p text:style-name="P4"/>
      <text:p text:style-name="P8"><text:span text:style-name="T9">The Python code provided implements all of the above techniques. It is fully self-contained, requires no internet connection, and is compatible with any system running Python 3.7+ with standard scientific packages (NumPy, SciPy, scikit-learn, TensorFlow).</text:span></text:p>
      <text:p text:style-name="P9"/>
      <text:h text:style-name="P2" text:outline-level="1"><text:span text:style-name="T3">13. Future Scope</text:span></text:h>
      <text:p text:style-name="P10"><text:span text:style-name="T14">• </text:span><text:span text:style-name="T15"><text:s/>Self-attention mechanisms (Audio Spectrogram Transformer, Wav2Vec) may further improve accuracy by capturing global signal context.</text:span><text:span text:style-name="T8">Transformer-Based Models:</text:span></text:p>
      <text:p text:style-name="P10"><text:span text:style-name="T14">• </text:span><text:span text:style-name="T15"><text:s/>Pre-trained audio models (YAMNet, PANNs) fine-tuned on sonar data can achieve high accuracy with limited labelled data.</text:span><text:span text:style-name="T8">Transfer Learning:</text:span></text:p>
      <text:p text:style-name="P10"><text:span text:style-name="T14">• </text:span><text:span text:style-name="T15"><text:s/>TensorFlow Lite / ONNX quantisation for embedded DSP deployment in torpedo guidance units.</text:span><text:span text:style-name="T8">Real-Time Deployment:</text:span></text:p>
      <text:p text:style-name="P10"><text:span text:style-name="T14">• </text:span><text:span text:style-name="T15"><text:s/>Adding simulated noise, frequency masking, and time shifting to augment limited training data.</text:span><text:span text:style-name="T8">Data Augmentation:</text:span></text:p>
      <text:p text:style-name="P10"><text:span text:style-name="T14">• </text:span><text:span text:style-name="T15"><text:s/>Combining hydrophone arrays using beamforming before classification for improved SNR and directional sensitivity.</text:span><text:span text:style-name="T8">Multi-Sensor Fusion:</text:span></text:p>
      <text:p text:style-name="P11"><text:span text:style-name="T16">[R41] K. Guo et al., "PANNs: Large-Scale Pretrained Audio Neural Networks for Audio Pattern Recognition," IEEE/ACM Trans. Audio Speech Lang. Process., vol. 28, pp. 2880–2894, 2020.</text:span></text:p>
      <text:p text:style-name="P9"/>
      <text:h text:style-name="P2" text:outline-level="1"><text:span text:style-name="T3">14. References</text:span></text:h>
      <text:p text:style-name="P4"/>
      <table:table table:name="Table3" table:style-name="Table3">
        <table:table-column table:style-name="Table3.A"/>
        <table:table-column table:style-name="Table3.B"/>
        <table:table-row table:style-name="Table3.1">
          <table:table-cell table:style-name="Table3.A1" office:value-type="string">
            <text:p text:style-name="P7"><text:span text:style-name="T5">[R1]</text:span></text:p>
          </table:table-cell>
          <table:table-cell table:style-name="Table3.B1" office:value-type="string">
            <text:p text:style-name="P12"><text:span text:style-name="T13">H. D. Waite, "Sonar for Practising Engineers," 3rd ed., Wiley, 2002.</text:span></text:p>
          </table:table-cell>
        </table:table-row>
        <table:table-row table:style-name="Table3.1">
          <table:table-cell table:style-name="Table3.A1" office:value-type="string">
            <text:p text:style-name="P7"><text:span text:style-name="T5">[R2]</text:span></text:p>
          </table:table-cell>
          <table:table-cell table:style-name="Table3.B2" office:value-type="string">
            <text:p text:style-name="P12"><text:span text:style-name="T13">R. J. Urick, "Principles of Underwater Sound," 3rd ed., McGraw-Hill, 1983.</text:span></text:p>
          </table:table-cell>
        </table:table-row>
        <text:soft-page-break/>
        <table:table-row table:style-name="Table3.1">
          <table:table-cell table:style-name="Table3.A1" office:value-type="string">
            <text:p text:style-name="P7"><text:span text:style-name="T5">[R3]</text:span></text:p>
          </table:table-cell>
          <table:table-cell table:style-name="Table3.B1" office:value-type="string">
            <text:p text:style-name="P12"><text:span text:style-name="T13">IEEE Std 1241-2010, "IEEE Standard for Terminology and Test Methods for Analog-to-Digital Converters," IEEE, 2011.</text:span></text:p>
          </table:table-cell>
        </table:table-row>
        <table:table-row table:style-name="Table3.1">
          <table:table-cell table:style-name="Table3.A1" office:value-type="string">
            <text:p text:style-name="P7"><text:span text:style-name="T5">[R4]</text:span></text:p>
          </table:table-cell>
          <table:table-cell table:style-name="Table3.B2" office:value-type="string">
            <text:p text:style-name="P12"><text:span text:style-name="T13">G. M. Wenz, "Acoustic Ambient Noise in the Ocean: Spectra and Sources," J. Acoust. Soc. Am., vol. 34, no. 12, pp. 1936–1956, 1962.</text:span></text:p>
          </table:table-cell>
        </table:table-row>
        <table:table-row table:style-name="Table3.1">
          <table:table-cell table:style-name="Table3.A1" office:value-type="string">
            <text:p text:style-name="P7"><text:span text:style-name="T5">[R5]</text:span></text:p>
          </table:table-cell>
          <table:table-cell table:style-name="Table3.B1" office:value-type="string">
            <text:p text:style-name="P12"><text:span text:style-name="T13">A. V. Oppenheim and R. W. Schafer, "Discrete-Time Signal Processing," 3rd ed., Prentice Hall, 2010.</text:span></text:p>
          </table:table-cell>
        </table:table-row>
        <table:table-row table:style-name="Table3.1">
          <table:table-cell table:style-name="Table3.A1" office:value-type="string">
            <text:p text:style-name="P7"><text:span text:style-name="T5">[R6]</text:span></text:p>
          </table:table-cell>
          <table:table-cell table:style-name="Table3.B2" office:value-type="string">
            <text:p text:style-name="P12"><text:span text:style-name="T13">S. D. Stearns, "Digital Signal Processing with Examples in MATLAB," CRC Press, 2003.</text:span></text:p>
          </table:table-cell>
        </table:table-row>
        <table:table-row table:style-name="Table3.1">
          <table:table-cell table:style-name="Table3.A1" office:value-type="string">
            <text:p text:style-name="P7"><text:span text:style-name="T5">[R7]</text:span></text:p>
          </table:table-cell>
          <table:table-cell table:style-name="Table3.B1" office:value-type="string">
            <text:p text:style-name="P12"><text:span text:style-name="T13">IEEE Std 1057-2017, "IEEE Standard for Digitizing Waveforms," IEEE, 2017.</text:span></text:p>
          </table:table-cell>
        </table:table-row>
        <table:table-row table:style-name="Table3.1">
          <table:table-cell table:style-name="Table3.A1" office:value-type="string">
            <text:p text:style-name="P7"><text:span text:style-name="T5">[R8]</text:span></text:p>
          </table:table-cell>
          <table:table-cell table:style-name="Table3.B2" office:value-type="string">
            <text:p text:style-name="P12"><text:span text:style-name="T13">F. J. Harris, "On the Use of Windows for Harmonic Analysis with the Discrete Fourier Transform," Proc. IEEE, vol. 66, no. 1, pp. 51–83, 1978.</text:span></text:p>
          </table:table-cell>
        </table:table-row>
        <table:table-row table:style-name="Table3.1">
          <table:table-cell table:style-name="Table3.A1" office:value-type="string">
            <text:p text:style-name="P7"><text:span text:style-name="T5">[R9]</text:span></text:p>
          </table:table-cell>
          <table:table-cell table:style-name="Table3.B1" office:value-type="string">
            <text:p text:style-name="P12"><text:span text:style-name="T13">B. Li, P. W. Tse, D. Wang, and X. Liang, "Fault Diagnosis of Rotating Machinery Using Frequency-Domain Features," Expert Syst. Appl., vol. 37, pp. 2360–2369, 2010.</text:span></text:p>
          </table:table-cell>
        </table:table-row>
        <table:table-row table:style-name="Table3.1">
          <table:table-cell table:style-name="Table3.A1" office:value-type="string">
            <text:p text:style-name="P7"><text:span text:style-name="T5">[R10]</text:span></text:p>
          </table:table-cell>
          <table:table-cell table:style-name="Table3.B2" office:value-type="string">
            <text:p text:style-name="P12"><text:span text:style-name="T13">P. D. Welch, "The Use of Fast Fourier Transform for the Estimation of Power Spectra," IEEE Trans. Audio Electroacoust., vol. 15, no. 2, pp. 70–73, 1967.</text:span></text:p>
          </table:table-cell>
        </table:table-row>
        <table:table-row table:style-name="Table3.1">
          <table:table-cell table:style-name="Table3.A1" office:value-type="string">
            <text:p text:style-name="P7"><text:span text:style-name="T5">[R11]</text:span></text:p>
          </table:table-cell>
          <table:table-cell table:style-name="Table3.B1" office:value-type="string">
            <text:p text:style-name="P12"><text:span text:style-name="T13">L. E. Kinsler, A. R. Frey, A. B. Coppens, and J. V. Sanders, "Fundamentals of Acoustics," 4th ed., Wiley, 2000.</text:span></text:p>
          </table:table-cell>
        </table:table-row>
        <table:table-row table:style-name="Table3.1">
          <table:table-cell table:style-name="Table3.A1" office:value-type="string">
            <text:p text:style-name="P7"><text:span text:style-name="T5">[R12]</text:span></text:p>
          </table:table-cell>
          <table:table-cell table:style-name="Table3.B2" office:value-type="string">
            <text:p text:style-name="P12"><text:span text:style-name="T13">L. Cohen, "Time-Frequency Analysis," Prentice Hall, 1995.</text:span></text:p>
          </table:table-cell>
        </table:table-row>
        <table:table-row table:style-name="Table3.1">
          <table:table-cell table:style-name="Table3.A1" office:value-type="string">
            <text:p text:style-name="P7"><text:span text:style-name="T5">[R13]</text:span></text:p>
          </table:table-cell>
          <table:table-cell table:style-name="Table3.B1" office:value-type="string">
            <text:p text:style-name="P12"><text:span text:style-name="T13">P. Flandrin, "Time-Frequency / Time-Scale Analysis," Academic Press, 1999.</text:span></text:p>
          </table:table-cell>
        </table:table-row>
        <table:table-row table:style-name="Table3.1">
          <table:table-cell table:style-name="Table3.A1" office:value-type="string">
            <text:p text:style-name="P7"><text:span text:style-name="T5">[R14]</text:span></text:p>
          </table:table-cell>
          <table:table-cell table:style-name="Table3.B2" office:value-type="string">
            <text:p text:style-name="P12"><text:span text:style-name="T13">S. B. Davis and P. Mermelstein, "Comparison of Parametric Representations for Monosyllabic Word Recognition," IEEE Trans. Acoust., Speech Signal Process., vol. 28, no. 4, pp. 357–366, 1980.</text:span></text:p>
          </table:table-cell>
        </table:table-row>
        <table:table-row table:style-name="Table3.1">
          <table:table-cell table:style-name="Table3.A1" office:value-type="string">
            <text:p text:style-name="P7"><text:span text:style-name="T5">[R15]</text:span></text:p>
          </table:table-cell>
          <table:table-cell table:style-name="Table3.B1" office:value-type="string">
            <text:p text:style-name="P12"><text:span text:style-name="T13">K. Bountourakis, L. Vrysis, and G. Papanikolaou, "Machine Learning Algorithms for Environmental Sound Recognition," Proc. IISA, 2019.</text:span></text:p>
          </table:table-cell>
        </table:table-row>
        <table:table-row table:style-name="Table3.1">
          <table:table-cell table:style-name="Table3.A1" office:value-type="string">
            <text:p text:style-name="P7"><text:span text:style-name="T5">[R16]</text:span></text:p>
          </table:table-cell>
          <table:table-cell table:style-name="Table3.B2" office:value-type="string">
            <text:p text:style-name="P12"><text:span text:style-name="T13">S. Mallat, "A Wavelet Tour of Signal Processing," 3rd ed., Academic Press, 2009.</text:span></text:p>
          </table:table-cell>
        </table:table-row>
        <table:table-row table:style-name="Table3.1">
          <table:table-cell table:style-name="Table3.A1" office:value-type="string">
            <text:p text:style-name="P7"><text:span text:style-name="T5">[R17]</text:span></text:p>
          </table:table-cell>
          <table:table-cell table:style-name="Table3.B1" office:value-type="string">
            <text:p text:style-name="P12"><text:span text:style-name="T13">D. E. Newland, "An Introduction to Random Vibrations, Spectral and Wavelet Analysis," 3rd ed., Dover, 2005.</text:span></text:p>
          </table:table-cell>
        </table:table-row>
        <table:table-row table:style-name="Table3.1">
          <table:table-cell table:style-name="Table3.A1" office:value-type="string">
            <text:p text:style-name="P7"><text:span text:style-name="T5">[R18]</text:span></text:p>
          </table:table-cell>
          <table:table-cell table:style-name="Table3.B2" office:value-type="string">
            <text:p text:style-name="P12"><text:span text:style-name="T13">V. N. Vapnik, "The Nature of Statistical Learning Theory," 2nd ed., Springer, 2000.</text:span></text:p>
          </table:table-cell>
        </table:table-row>
        <table:table-row table:style-name="Table3.1">
          <table:table-cell table:style-name="Table3.A1" office:value-type="string">
            <text:p text:style-name="P7"><text:span text:style-name="T5">[R19]</text:span></text:p>
          </table:table-cell>
          <table:table-cell table:style-name="Table3.B1" office:value-type="string">
            <text:p text:style-name="P12"><text:span text:style-name="T13">K.-R. Muller et al., "An Introduction to Kernel-Based Learning Algorithms," IEEE Trans. Neural Netw., vol. 12, no. 2, pp. 181–201, 2001.</text:span></text:p>
          </table:table-cell>
        </table:table-row>
        <table:table-row table:style-name="Table3.1">
          <table:table-cell table:style-name="Table3.A1" office:value-type="string">
            <text:p text:style-name="P7"><text:span text:style-name="T5">[R20]</text:span></text:p>
          </table:table-cell>
          <table:table-cell table:style-name="Table3.B2" office:value-type="string">
            <text:p text:style-name="P12"><text:span text:style-name="T13">Y. Shin, Y. Kim, and S. Yoon, "SVM-Based Underwater Acoustic Target Classification," J. Mar. Sci. Eng., vol. 9, p. 774, 2021.</text:span></text:p>
          </table:table-cell>
        </table:table-row>
        <table:table-row table:style-name="Table3.1">
          <table:table-cell table:style-name="Table3.A1" office:value-type="string">
            <text:p text:style-name="P7"><text:span text:style-name="T5">[R21]</text:span></text:p>
          </table:table-cell>
          <table:table-cell table:style-name="Table3.B1" office:value-type="string">
            <text:p text:style-name="P12"><text:span text:style-name="T13">L. Breiman, "Random Forests," Machine Learning, vol. 45, pp. 5–32, 2001.</text:span></text:p>
          </table:table-cell>
        </table:table-row>
        <table:table-row table:style-name="Table3.1">
          <table:table-cell table:style-name="Table3.A1" office:value-type="string">
            <text:p text:style-name="P7"><text:span text:style-name="T5">[R22]</text:span></text:p>
          </table:table-cell>
          <table:table-cell table:style-name="Table3.B2" office:value-type="string">
            <text:p text:style-name="P12"><text:span text:style-name="T13">M. Fernandez-Delgado et al., "Do We Need Hundreds of Classifiers to Solve Real World Classification Problems?," J. Mach. Learn. Res., vol. 15, pp. 3133–3181, 2014.</text:span></text:p>
          </table:table-cell>
        </table:table-row>
        <table:table-row table:style-name="Table3.1">
          <table:table-cell table:style-name="Table3.A1" office:value-type="string">
            <text:p text:style-name="P7"><text:span text:style-name="T5">[R23]</text:span></text:p>
          </table:table-cell>
          <table:table-cell table:style-name="Table3.B1" office:value-type="string">
            <text:p text:style-name="P12"><text:span text:style-name="T13">T. Chen and C. Guestrin, "XGBoost: A Scalable Tree Boosting System," in Proc. ACM KDD, pp. 785–794, 2016.</text:span></text:p>
          </table:table-cell>
        </table:table-row>
        <table:table-row table:style-name="Table3.1">
          <table:table-cell table:style-name="Table3.A1" office:value-type="string">
            <text:p text:style-name="P7"><text:span text:style-name="T5">[R24]</text:span></text:p>
          </table:table-cell>
          <table:table-cell table:style-name="Table3.B2" office:value-type="string">
            <text:p text:style-name="P12"><text:span text:style-name="T13">Z.-H. Zhou, "Ensemble Methods: Foundations and Algorithms," CRC Press, 2012.</text:span></text:p>
          </table:table-cell>
        </table:table-row>
        <table:table-row table:style-name="Table3.1">
          <table:table-cell table:style-name="Table3.A1" office:value-type="string">
            <text:p text:style-name="P7"><text:span text:style-name="T5">[R25]</text:span></text:p>
          </table:table-cell>
          <table:table-cell table:style-name="Table3.B1" office:value-type="string">
            <text:p text:style-name="P12"><text:span text:style-name="T13">R. E. Schapire, "Explaining AdaBoost," in Empirical Inference, Springer, pp. 37–52, 2013.</text:span></text:p>
          </table:table-cell>
        </table:table-row>
        <table:table-row table:style-name="Table3.1">
          <table:table-cell table:style-name="Table3.A1" office:value-type="string">
            <text:p text:style-name="P7"><text:span text:style-name="T5">[R26]</text:span></text:p>
          </table:table-cell>
          <table:table-cell table:style-name="Table3.B2" office:value-type="string">
            <text:p text:style-name="P12"><text:span text:style-name="T13">S. Kiranyaz et al., "1D Convolutional Neural Networks and Applications: A Survey," Mech. Syst. Signal Process., vol. 151, p. 107398, 2021.</text:span></text:p>
          </table:table-cell>
        </table:table-row>
        <table:table-row table:style-name="Table3.1">
          <table:table-cell table:style-name="Table3.A1" office:value-type="string">
            <text:p text:style-name="P7"><text:span text:style-name="T5">[R27]</text:span></text:p>
          </table:table-cell>
          <table:table-cell table:style-name="Table3.B1" office:value-type="string">
            <text:p text:style-name="P12"><text:span text:style-name="T13">J. Abdoli, M. Cardinal, and A. L. Koerich, "End-to-End Environmental Sound Classification using a 1D CNN," Proc. EUSIPCO, 2019.</text:span></text:p>
          </table:table-cell>
        </table:table-row>
        <text:soft-page-break/>
        <table:table-row table:style-name="Table3.1">
          <table:table-cell table:style-name="Table3.A1" office:value-type="string">
            <text:p text:style-name="P7"><text:span text:style-name="T5">[R28]</text:span></text:p>
          </table:table-cell>
          <table:table-cell table:style-name="Table3.B2" office:value-type="string">
            <text:p text:style-name="P12"><text:span text:style-name="T13">S. Hochreiter and J. Schmidhuber, "Long Short-Term Memory," Neural Comput., vol. 9, no. 8, pp. 1735–1780, 1997.</text:span></text:p>
          </table:table-cell>
        </table:table-row>
        <table:table-row table:style-name="Table3.1">
          <table:table-cell table:style-name="Table3.A1" office:value-type="string">
            <text:p text:style-name="P7"><text:span text:style-name="T5">[R29]</text:span></text:p>
          </table:table-cell>
          <table:table-cell table:style-name="Table3.B1" office:value-type="string">
            <text:p text:style-name="P12"><text:span text:style-name="T13">M. Schuster and K. K. Paliwal, "Bidirectional Recurrent Neural Networks," IEEE Trans. Signal Process., vol. 45, no. 11, pp. 2673–2681, 1997.</text:span></text:p>
          </table:table-cell>
        </table:table-row>
        <table:table-row table:style-name="Table3.1">
          <table:table-cell table:style-name="Table3.A1" office:value-type="string">
            <text:p text:style-name="P7"><text:span text:style-name="T5">[R30]</text:span></text:p>
          </table:table-cell>
          <table:table-cell table:style-name="Table3.B2" office:value-type="string">
            <text:p text:style-name="P12"><text:span text:style-name="T13">W. Chen et al., "A Hybrid CNN-LSTM Model for Underwater Acoustic Target Recognition," Appl. Acoust., vol. 163, p. 107231, 2020.</text:span></text:p>
          </table:table-cell>
        </table:table-row>
        <table:table-row table:style-name="Table3.1">
          <table:table-cell table:style-name="Table3.A1" office:value-type="string">
            <text:p text:style-name="P7"><text:span text:style-name="T5">[R31]</text:span></text:p>
          </table:table-cell>
          <table:table-cell table:style-name="Table3.B1" office:value-type="string">
            <text:p text:style-name="P12"><text:span text:style-name="T13">N. Siddique and S. Paheding, "U-Net and Its Variants for Medical Image Segmentation: A Review," IEEE Access, vol. 9, pp. 82031–82057, 2021.</text:span></text:p>
          </table:table-cell>
        </table:table-row>
        <table:table-row table:style-name="Table3.1">
          <table:table-cell table:style-name="Table3.A1" office:value-type="string">
            <text:p text:style-name="P7"><text:span text:style-name="T5">[R32]</text:span></text:p>
          </table:table-cell>
          <table:table-cell table:style-name="Table3.B2" office:value-type="string">
            <text:p text:style-name="P12"><text:span text:style-name="T13">Y. LeCun, Y. Bengio, and G. Hinton, "Deep Learning," Nature, vol. 521, no. 7553, pp. 436–444, 2015.</text:span></text:p>
          </table:table-cell>
        </table:table-row>
        <table:table-row table:style-name="Table3.1">
          <table:table-cell table:style-name="Table3.A1" office:value-type="string">
            <text:p text:style-name="P7"><text:span text:style-name="T5">[R33]</text:span></text:p>
          </table:table-cell>
          <table:table-cell table:style-name="Table3.B1" office:value-type="string">
            <text:p text:style-name="P12"><text:span text:style-name="T13">J. Davis and M. Goadrich, "The Relationship Between Precision-Recall and ROC Curves," Proc. ICML, pp. 233–240, 2006.</text:span></text:p>
          </table:table-cell>
        </table:table-row>
        <table:table-row table:style-name="Table3.1">
          <table:table-cell table:style-name="Table3.A1" office:value-type="string">
            <text:p text:style-name="P7"><text:span text:style-name="T5">[R34]</text:span></text:p>
          </table:table-cell>
          <table:table-cell table:style-name="Table3.B2" office:value-type="string">
            <text:p text:style-name="P12"><text:span text:style-name="T13">T. Fawcett, "An Introduction to ROC Analysis," Pattern Recogn. Lett., vol. 27, no. 8, pp. 861–874, 2006.</text:span></text:p>
          </table:table-cell>
        </table:table-row>
        <table:table-row table:style-name="Table3.1">
          <table:table-cell table:style-name="Table3.A1" office:value-type="string">
            <text:p text:style-name="P7"><text:span text:style-name="T5">[R35]</text:span></text:p>
          </table:table-cell>
          <table:table-cell table:style-name="Table3.B1" office:value-type="string">
            <text:p text:style-name="P12"><text:span text:style-name="T13">R. P. Gorman and T. J. Sejnowski, "Analysis of Hidden Units in a Layered Network Trained to Classify Sonar Targets," Neural Networks, vol. 1, pp. 75–89, 1988.</text:span></text:p>
          </table:table-cell>
        </table:table-row>
        <table:table-row table:style-name="Table3.1">
          <table:table-cell table:style-name="Table3.A1" office:value-type="string">
            <text:p text:style-name="P7"><text:span text:style-name="T5">[R36]</text:span></text:p>
          </table:table-cell>
          <table:table-cell table:style-name="Table3.B2" office:value-type="string">
            <text:p text:style-name="P12"><text:span text:style-name="T13">S. E. Crocker, "An Introduction to Sonar Signal Analysis," Naval Postgraduate School Technical Report, 2004.</text:span></text:p>
          </table:table-cell>
        </table:table-row>
        <table:table-row table:style-name="Table3.1">
          <table:table-cell table:style-name="Table3.A1" office:value-type="string">
            <text:p text:style-name="P7"><text:span text:style-name="T5">[R37]</text:span></text:p>
          </table:table-cell>
          <table:table-cell table:style-name="Table3.B1" office:value-type="string">
            <text:p text:style-name="P12"><text:span text:style-name="T13">X. Liu, R. Jiang, and Q. Xu, "Ship Radiated Noise Recognition Based on SVM and Subspace," J. Computat. Acoust., 2014.</text:span></text:p>
          </table:table-cell>
        </table:table-row>
        <table:table-row table:style-name="Table3.1">
          <table:table-cell table:style-name="Table3.A1" office:value-type="string">
            <text:p text:style-name="P7"><text:span text:style-name="T5">[R38]</text:span></text:p>
          </table:table-cell>
          <table:table-cell table:style-name="Table3.B2" office:value-type="string">
            <text:p text:style-name="P12"><text:span text:style-name="T13">Y. Zhang, S. Jin, and M. Xue, "Convolutional Neural Network-Based Underwater Target Recognition," Proc. OCEANS, 2018.</text:span></text:p>
          </table:table-cell>
        </table:table-row>
        <table:table-row table:style-name="Table3.1">
          <table:table-cell table:style-name="Table3.A1" office:value-type="string">
            <text:p text:style-name="P7"><text:span text:style-name="T5">[R39]</text:span></text:p>
          </table:table-cell>
          <table:table-cell table:style-name="Table3.B1" office:value-type="string">
            <text:p text:style-name="P12"><text:span text:style-name="T13">W. Chen, Z. Zhang, and L. Luo, "A Hybrid CNN-LSTM Model for Underwater Acoustic Target Recognition," Appl. Acoust., vol. 163, 2020.</text:span></text:p>
          </table:table-cell>
        </table:table-row>
        <table:table-row table:style-name="Table3.1">
          <table:table-cell table:style-name="Table3.A1" office:value-type="string">
            <text:p text:style-name="P7"><text:span text:style-name="T5">[R40]</text:span></text:p>
          </table:table-cell>
          <table:table-cell table:style-name="Table3.B2" office:value-type="string">
            <text:p text:style-name="P12"><text:span text:style-name="T13">D. Wang, Q. Peter, and Y. Lin, "Ensemble Learning for Passive Sonar Classification," IEEE Trans. Geosci. Remote Sens., 2021.</text:span></text:p>
          </table:table-cell>
        </table:table-row>
        <table:table-row table:style-name="Table3.1">
          <table:table-cell table:style-name="Table3.A1" office:value-type="string">
            <text:p text:style-name="P7"><text:span text:style-name="T5">[R41]</text:span></text:p>
          </table:table-cell>
          <table:table-cell table:style-name="Table3.B1" office:value-type="string">
            <text:p text:style-name="P12"><text:span text:style-name="T13">K. Guo et al., "PANNs: Large-Scale Pretrained Audio Neural Networks for Audio Pattern Recognition," IEEE/ACM Trans. Audio Speech Lang. Process., vol. 28, pp. 2880–2894, 2020.</text:span></text:p>
          </table:table-cell>
        </table:table-row>
      </table:table>
      <text:p text:style-name="P9"/>
      <text:h text:style-name="P2" text:outline-level="1"><text:span text:style-name="T3">15. Conclusion</text:span></text:h>
      <text:p text:style-name="P8"><text:span text:style-name="T9">This literature survey has systematically reviewed the signal processing, feature extraction, classical machine learning, and deep learning techniques applicable to the wake homing sonar target detection problem. The key findings are:</text:span></text:p>
      <text:p text:style-name="P10"><text:span text:style-name="T14">• </text:span><text:span text:style-name="T8">Signal Preprocessing: Butterworth bandpass filtering (20–8 kHz) and amplitude normalisation are essential first steps to improve SNR in ocean environments.</text:span></text:p>
      <text:p text:style-name="P10"><text:span text:style-name="T14">• </text:span><text:span text:style-name="T8">Feature Engineering: A combination of time-domain statistics, PSD-based spectral features, STFT sub-band energies, and MFCCs provides the most discriminative representation for classical ML models.</text:span></text:p>
      <text:p text:style-name="P10"><text:span text:style-name="T14">• </text:span><text:span text:style-name="T8">Classical ML: SVM with RBF kernel, Random Forest, and XGBoost are all well-validated for acoustic sonar classification, each offering 88–97% accuracy on feature-based inputs.</text:span></text:p>
      <text:p text:style-name="P10"><text:span text:style-name="T14">• </text:span><text:span text:style-name="T8">Deep Learning: The CNN-LSTM hybrid architecture consistently achieves the highest accuracy (95–99%) by combining local feature extraction with temporal sequence modelling — making it the most powerful approach for raw sonar signal classification.</text:span></text:p>
      <text:p text:style-name="P10"><text:span text:style-name="T14">• </text:span><text:span text:style-name="T8">Ensemble Strategy: Combining multiple classifiers through soft voting reduces variance and consistently outperforms individual models.</text:span></text:p>
      <text:p text:style-name="P10"><text:span text:style-name="T14">• </text:span><text:span text:style-name="T8">Evaluation: ROC-AUC and F1-Score are the recommended primary metrics for this binary classification task due to potential class imbalance in operational sonar data.</text:span></text:p>
      <text:p text:style-name="P4"><text:soft-page-break/></text:p>
      <text:p text:style-name="P8"><text:span text:style-name="T9">The Python implementation provided with this report faithfully realises all of the above techniques in a single, portable, internet-independent pipeline. It supports both synthetic testing and plug-in use with real sonar datasets in CSV or NumPy format.</text:span></text:p>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IN"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IN"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text">
      <style:paragraph-properties fo:margin-top="0.635cm" fo:margin-bottom="0.282cm" style:contextual-spacing="false"/>
      <style:text-properties fo:color="#1b3a6b" loext:opacity="100%" style:font-name="Arial1" fo:font-family="Arial" style:font-family-generic="swiss" style:font-pitch="variable" fo:font-size="19pt" fo:font-weight="bold" style:font-name-asian="Arial2" style:font-family-asian="Arial" style:font-family-generic-asian="system" style:font-pitch-asian="variable" style:font-size-asian="19pt" style:font-weight-asian="bold" style:font-name-complex="Arial2" style:font-family-complex="Arial" style:font-family-generic-complex="system" style:font-pitch-complex="variable" style:font-size-complex="19pt" style:font-weight-complex="bold"/>
    </style:style>
    <style:style style:name="Heading_20_2" style:display-name="Heading 2" style:family="paragraph" style:parent-style-name="Heading" style:default-outline-level="2" style:list-style-name="" style:class="text">
      <style:paragraph-properties fo:margin-top="0.423cm" fo:margin-bottom="0.212cm" style:contextual-spacing="false"/>
      <style:text-properties fo:color="#0e7490"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3" style:display-name="Heading 3" style:family="paragraph" style:parent-style-name="Heading" style:default-outline-level="3" style:list-style-name="" style:class="text">
      <style:paragraph-properties fo:margin-top="0.318cm" fo:margin-bottom="0.176cm" style:contextual-spacing="false"/>
      <style:text-properties fo:color="#1b3a6b"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4" style:display-name="Heading 4" style:family="paragraph" style:parent-style-name="Heading" style:default-outline-level="4" style:list-style-name="" style:class="text">
      <style:paragraph-properties fo:margin-top="0.247cm" fo:margin-bottom="0.141cm" style:contextual-spacing="false"/>
      <style:text-properties fo:color="#0f172a" loext:opacity="100%" style:font-name="Arial1" fo:font-family="Arial" style:font-family-generic="swiss" style:font-pitch="variable" fo:font-size="11pt" fo:font-weight="bold" style:font-name-asian="Arial2" style:font-family-asian="Arial" style:font-family-generic-asian="system" style:font-pitch-asian="variable" style:font-size-asian="11pt" style:font-weight-asian="bold" style:font-name-complex="Arial2" style:font-family-complex="Arial" style:font-family-generic-complex="system" style:font-pitch-complex="variable" style:font-size-complex="11pt" style:font-weight-complex="bold"/>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905cm" fo:margin-bottom="1.905cm" fo:margin-left="2.223cm" fo:margin-right="1.90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named</meta:initial-creator>
    <dc:creator>Un-named</dc:creator>
    <meta:editing-cycles>1</meta:editing-cycles>
    <meta:creation-date>2026-06-12T01:35:00.705000000</meta:creation-date>
    <dc:date>2026-06-12T01:35:00.705000000</dc:date>
    <meta:document-statistic meta:table-count="3" meta:image-count="0" meta:object-count="0" meta:page-count="14" meta:paragraph-count="368" meta:word-count="4567" meta:character-count="30837" meta:non-whitespace-character-count="26614"/>
    <meta:generator>LibreOffice/7.3.7.2$Linux_X86_64 LibreOffice_project/30$Build-2</meta:generator>
  </office:meta>
</office:document-meta>
</file>